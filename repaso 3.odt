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0000001C205D5023CF8F3244F.png" manifest:media-type="image/png"/>
  <manifest:file-entry manifest:full-path="Pictures/10000001000002E100000158E0F00230A64082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a35d" officeooo:paragraph-rsid="0008a35d"/>
    </style:style>
    <style:style style:name="P2" style:family="paragraph" style:parent-style-name="Standard">
      <style:text-properties officeooo:rsid="0008a35d" officeooo:paragraph-rsid="00097fff"/>
    </style:style>
    <style:style style:name="P3" style:family="paragraph" style:parent-style-name="Standard">
      <style:text-properties officeooo:rsid="00097fff" officeooo:paragraph-rsid="00097fff"/>
    </style:style>
    <style:style style:name="P4" style:family="paragraph" style:parent-style-name="Standard">
      <style:text-properties officeooo:paragraph-rsid="00097fff"/>
    </style:style>
    <style:style style:name="P5" style:family="paragraph" style:parent-style-name="Standard">
      <style:text-properties style:text-underline-style="solid" style:text-underline-width="auto" style:text-underline-color="font-color" officeooo:rsid="00097fff" officeooo:paragraph-rsid="00097fff"/>
    </style:style>
    <style:style style:name="P6" style:family="paragraph" style:parent-style-name="Table_20_Contents">
      <style:text-properties officeooo:rsid="00097fff" officeooo:paragraph-rsid="00097fff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8a35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97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fo:min-height="0.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0.6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0.7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fo:min-height="0.6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0.8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0.8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) La organización dispone de la red 191.8.0.0/20</text:p>
      <text:p text:style-name="P1"/>
      <text:p text:style-name="P1">255.255.240.0 = 255.255.11110000.00000000</text:p>
      <text:p text:style-name="P1"/>
      <text:p text:style-name="P1">La red ya tiene configuradas las redes B y A, con 191.8.0.0/25 y 191.8.0.128/26 respectivamente</text:p>
      <text:p text:style-name="P1"/>
      <text:p text:style-name="P1">Luego de la red B quedaria libre la red 191.8.1.0/25 y la 191.8.0.128/25 (subneteada luego para A)</text:p>
      <text:p text:style-name="P1"/>
      <text:p text:style-name="P1">Luego de la red A quedaria libre la red 191.8.0.192/26</text:p>
      <text:p text:style-name="P1"/>
      <text:p text:style-name="P1">Para que puedan ser sumarizadas las redes A-B-C <text:s/>primero asignaremos a Red C la red 191.8.0.192/26</text:p>
      <text:p text:style-name="P1"/>
      <text:p text:style-name="P1">Red D tiene 31 hosts por lo que requerira de al menos 33 direcciones, se necesitan 6 bits</text:p>
      <text:p text:style-name="P1"/>
      <text:p text:style-name="P1">tomamos la proxima direccion libre ( 191.8.1.0/25 )</text:p>
      <text:p text:style-name="P1">tomamos un bit para subnetear y dejamos el resto para hosts</text:p>
      <text:p text:style-name="P1">nueva mascara = /26 = 255.255.255.192</text:p>
      <text:p text:style-name="P1"/>
      <text:p text:style-name="P1">191.8.1.0|0|000000 = 191.8.1.0/26 → asignada <text:span text:style-name="T4">a red D</text:span></text:p>
      <text:p text:style-name="P1">191.8.1.0|1|000000 = 191.8.1.64/26 → <text:s/>libre</text:p>
      <text:p text:style-name="P1"/>
      <text:p text:style-name="P3">de esta manera, luego de la sumarizacion quedaria 191.8.0.0/24</text:p>
      <text:p text:style-name="P1">------------------------------------------------</text:p>
      <text:p text:style-name="P3">b)</text:p>
      <text:p text:style-name="P3">Redes de enlaces: solo queda por asignar la red que conecta routers A-B-D</text:p>
      <text:p text:style-name="P3"/>
      <text:p text:style-name="P3">para ello se necesitan 3 bits</text:p>
      <text:p text:style-name="P3"/>
      <text:p text:style-name="P3">tomamos la proxima direccion libre ( <text:span text:style-name="T1">1</text:span>72<text:span text:style-name="T1">.</text:span>16<text:span text:style-name="T1">.</text:span>3.72<text:span text:style-name="T1">/2</text:span>9<text:span text:style-name="T1"> </text:span>)</text:p>
      <text:p text:style-name="P3"/>
      <text:p text:style-name="P3">191.8.1.01|000|000 → asignada a routers A-B-D</text:p>
      <text:p text:style-name="P2"/>
      <text:p text:style-name="P2">------------------------------------------------</text:p>
      <text:p text:style-name="P3"><draw:frame text:anchor-type="paragraph" draw:z-index="1" draw:name="Marco de texto 1" draw:style-name="gr12" draw:text-style-name="P7" svg:width="2.894cm" svg:height="0.777cm" svg:x="10.132cm" svg:y="9.252cm"><draw:text-box><text:p>191.8.0.192/26</text:p></draw:text-box></draw:frame><draw:frame text:anchor-type="paragraph" draw:z-index="2" draw:name="Marco de texto 2" draw:style-name="gr11" draw:text-style-name="P7" svg:width="3.052cm" svg:height="1.763cm" svg:x="14.471cm" svg:y="4.092cm"><draw:text-box><text:p>191.8.1.0/26</text:p></draw:text-box></draw:frame><draw:frame text:anchor-type="paragraph" draw:z-index="3" draw:name="Marco de texto 3" draw:style-name="gr5" draw:text-style-name="P7" svg:width="2.629cm" svg:height="0.698cm" svg:x="7.989cm" svg:y="2.928cm"><draw:text-box><text:p>172.16.3.72/29</text:p></draw:text-box></draw:frame><draw:frame text:anchor-type="paragraph" draw:z-index="4" draw:name="Marco de texto 4" draw:style-name="gr4" draw:text-style-name="P7" svg:width="0.671cm" svg:height="0.671cm" svg:x="6.507cm" svg:y="3.272cm"><draw:text-box><text:p>.75</text:p></draw:text-box></draw:frame><draw:frame text:anchor-type="paragraph" draw:z-index="5" draw:name="Marco de texto 5" draw:style-name="gr9" draw:text-style-name="P7" svg:width="0.989cm" svg:height="0.83cm" svg:x="7.512cm" svg:y="5.733cm"><draw:text-box><text:p>.73</text:p></draw:text-box></draw:frame><draw:frame text:anchor-type="paragraph" draw:z-index="6" draw:name="Marco de texto 6" draw:style-name="gr6" draw:text-style-name="P7" svg:width="0.75cm" svg:height="0.724cm" svg:x="11.702cm" svg:y="3.51cm"><draw:text-box><text:p>.74</text:p></draw:text-box></draw:frame><draw:frame text:anchor-type="paragraph" draw:z-index="7" draw:name="Marco de texto 7" draw:style-name="gr10" draw:text-style-name="P7" svg:width="1.438cm" svg:height="1.068cm" svg:x="4.179cm" svg:y="3.933cm"><draw:text-box><text:p>.129</text:p></draw:text-box></draw:frame><draw:frame text:anchor-type="paragraph" draw:z-index="8" draw:name="Marco de texto 8" draw:style-name="gr9" draw:text-style-name="P7" svg:width="1.359cm" svg:height="0.83cm" svg:x="1.453cm" svg:y="2.32cm"><draw:text-box><text:p>.130</text:p></draw:text-box></draw:frame><draw:frame text:anchor-type="paragraph" draw:z-index="9" draw:name="Marco de texto 9" draw:style-name="gr6" draw:text-style-name="P7" svg:width="1.147cm" svg:height="0.724cm" svg:x="1.506cm" svg:y="4.754cm"><draw:text-box><text:p>.131</text:p></draw:text-box></draw:frame><draw:frame text:anchor-type="paragraph" draw:z-index="10" draw:name="Marco de texto 10" draw:style-name="gr5" draw:text-style-name="P7" svg:width="0.803cm" svg:height="0.698cm" svg:x="6.216cm" svg:y="6.738cm"><draw:text-box><text:p>.01</text:p></draw:text-box></draw:frame><draw:frame text:anchor-type="paragraph" draw:z-index="11" draw:name="Marco de texto 11" draw:style-name="gr8" draw:text-style-name="P7" svg:width="0.989cm" svg:height="0.803cm" svg:x="2.3cm" svg:y="7.161cm"><draw:text-box><text:p>.02</text:p></draw:text-box></draw:frame><draw:frame text:anchor-type="paragraph" draw:z-index="12" draw:name="Marco de texto 12" draw:style-name="gr7" draw:text-style-name="P7" svg:width="0.83cm" svg:height="0.618cm" svg:x="5.607cm" svg:y="8.378cm"><draw:text-box><text:p>.03</text:p></draw:text-box></draw:frame><draw:frame text:anchor-type="paragraph" draw:z-index="13" draw:name="Marco de texto 13" draw:style-name="gr6" draw:text-style-name="P7" svg:width="1.015cm" svg:height="0.724cm" svg:x="11.243cm" svg:y="6.235cm"><draw:text-box><text:p>.193</text:p></draw:text-box></draw:frame><draw:frame text:anchor-type="paragraph" draw:z-index="14" draw:name="Marco de texto 14" draw:style-name="gr4" draw:text-style-name="P7" svg:width="1.121cm" svg:height="0.671cm" svg:x="8.024cm" svg:y="8.484cm"><draw:text-box><text:p>.194</text:p></draw:text-box></draw:frame><draw:frame text:anchor-type="paragraph" draw:z-index="15" draw:name="Marco de texto 15" draw:style-name="gr5" draw:text-style-name="P7" svg:width="0.742cm" svg:height="0.698cm" svg:x="13.421cm" svg:y="4.357cm"><draw:text-box><text:p>.1</text:p></draw:text-box></draw:frame><draw:frame text:anchor-type="paragraph" draw:z-index="16" draw:name="Marco de texto 16" draw:style-name="gr4" draw:text-style-name="P7" svg:width="0.645cm" svg:height="0.671cm" svg:x="13.58cm" svg:y="6.606cm"><draw:text-box><text:p>.2</text:p></draw:text-box></draw:frame><draw:frame text:anchor-type="paragraph" draw:z-index="17" draw:name="Marco de texto 17" draw:style-name="gr3" draw:text-style-name="P7" svg:width="0.618cm" svg:height="0.75cm" svg:x="16.085cm" svg:y="6.606cm"><draw:text-box><text:p>.3</text:p></draw:text-box></draw:frame><draw:frame text:anchor-type="paragraph" draw:z-index="19" draw:name="Marco de texto 18" draw:style-name="gr1" draw:text-style-name="P7" svg:width="0.671cm" svg:height="0.648cm" svg:x="8.488cm" svg:y="4.637cm"><draw:text-box><text:p>e0</text:p></draw:text-box></draw:frame><draw:frame text:anchor-type="paragraph" draw:z-index="20" draw:name="Marco de texto 19" draw:style-name="gr2" draw:text-style-name="P7" svg:width="0.53cm" svg:height="0.6cm" svg:x="7.691cm" svg:y="3.625cm"><draw:text-box><text:p>e1</text:p></draw:text-box></draw:frame><draw:frame text:anchor-type="paragraph" draw:z-index="21" draw:name="Marco de texto 20" draw:style-name="gr1" draw:text-style-name="P7" svg:width="0.648cm" svg:height="0.648cm" svg:x="9.97cm" svg:y="3.625cm"><draw:text-box><text:p>e2</text:p></draw:text-box></draw:frame>c)<draw:frame draw:style-name="fr1" draw:name="Imagen1" text:anchor-type="char" svg:x="0.106cm" svg:y="0.679cm" svg:width="17cm" svg:height="9.193cm" draw:z-index="0"><draw:image xlink:href="Pictures/1000000100000340000001C205D5023CF8F3244F.png" xlink:type="simple" xlink:show="embed" xlink:actuate="onLoad" draw:mime-type="image/png"/></draw:frame></text:p>
      <text:p text:style-name="P3"><text:soft-page-break/></text:p>
      <text:p text:style-name="P3"/>
      <text:p text:style-name="P3">(sumarizada)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6">DIRECCION</text:p>
          </table:table-cell>
          <table:table-cell table:style-name="Tabla1.A1" office:value-type="string">
            <text:p text:style-name="P6">MASCARA</text:p>
          </table:table-cell>
          <table:table-cell table:style-name="Tabla1.A1" office:value-type="string">
            <text:p text:style-name="P6">NEXT-HOP</text:p>
          </table:table-cell>
          <table:table-cell table:style-name="Tabla1.D1" office:value-type="string">
            <text:p text:style-name="P6">INTERFACE</text:p>
          </table:table-cell>
        </table:table-row>
        <table:table-row>
          <table:table-cell table:style-name="Tabla1.A2" office:value-type="string">
            <text:p text:style-name="P6">172.16.3.64</text:p>
          </table:table-cell>
          <table:table-cell table:style-name="Tabla1.A2" office:value-type="string">
            <text:p text:style-name="Table_20_Contents">/<text:span text:style-name="T4">30</text:span></text:p>
          </table:table-cell>
          <table:table-cell table:style-name="Tabla1.A2" office:value-type="string">
            <text:p text:style-name="P6">172.16.3.65</text:p>
          </table:table-cell>
          <table:table-cell table:style-name="Tabla1.D2" office:value-type="string">
            <text:p text:style-name="P6">eth1</text:p>
          </table:table-cell>
        </table:table-row>
        <table:table-row>
          <table:table-cell table:style-name="Tabla1.A2" office:value-type="string">
            <text:p text:style-name="P6">172.16.3.68</text:p>
          </table:table-cell>
          <table:table-cell table:style-name="Tabla1.A2" office:value-type="string">
            <text:p text:style-name="Table_20_Contents">/<text:span text:style-name="T4">30</text:span></text:p>
          </table:table-cell>
          <table:table-cell table:style-name="Tabla1.A2" office:value-type="string">
            <text:p text:style-name="P6">172.16.3.70</text:p>
          </table:table-cell>
          <table:table-cell table:style-name="Tabla1.D2" office:value-type="string">
            <text:p text:style-name="P6">eth3</text:p>
          </table:table-cell>
        </table:table-row>
        <table:table-row>
          <table:table-cell table:style-name="Tabla1.A2" office:value-type="string">
            <text:p text:style-name="P6">172.16.3.72</text:p>
          </table:table-cell>
          <table:table-cell table:style-name="Tabla1.A2" office:value-type="string">
            <text:p text:style-name="Table_20_Contents">/<text:span text:style-name="T4">29</text:span></text:p>
          </table:table-cell>
          <table:table-cell table:style-name="Tabla1.A2" office:value-type="string">
            <text:p text:style-name="P6">172.16.3.74</text:p>
          </table:table-cell>
          <table:table-cell table:style-name="Tabla1.D2" office:value-type="string">
            <text:p text:style-name="P6">eth2</text:p>
          </table:table-cell>
        </table:table-row>
        <table:table-row>
          <table:table-cell table:style-name="Tabla1.A2" office:value-type="string">
            <text:p text:style-name="P6">191.8.0.0</text:p>
          </table:table-cell>
          <table:table-cell table:style-name="Tabla1.A2" office:value-type="string">
            <text:p text:style-name="Table_20_Contents">/<text:span text:style-name="T4">25</text:span></text:p>
          </table:table-cell>
          <table:table-cell table:style-name="Tabla1.A2" office:value-type="string">
            <text:p text:style-name="P6">-</text:p>
          </table:table-cell>
          <table:table-cell table:style-name="Tabla1.D2" office:value-type="string">
            <text:p text:style-name="P6">eth0</text:p>
          </table:table-cell>
        </table:table-row>
        <table:table-row>
          <table:table-cell table:style-name="Tabla1.A2" office:value-type="string">
            <text:p text:style-name="P6">191.8.0.128</text:p>
          </table:table-cell>
          <table:table-cell table:style-name="Tabla1.A2" office:value-type="string">
            <text:p text:style-name="Table_20_Contents">/<text:span text:style-name="T4">26</text:span></text:p>
          </table:table-cell>
          <table:table-cell table:style-name="Tabla1.A2" office:value-type="string">
            <text:p text:style-name="P6">172.16.3.65</text:p>
          </table:table-cell>
          <table:table-cell table:style-name="Tabla1.D2" office:value-type="string">
            <text:p text:style-name="P6">eth1</text:p>
          </table:table-cell>
        </table:table-row>
        <table:table-row>
          <table:table-cell table:style-name="Tabla1.A2" office:value-type="string">
            <text:p text:style-name="P6">191.8.0.192</text:p>
          </table:table-cell>
          <table:table-cell table:style-name="Tabla1.A2" office:value-type="string">
            <text:p text:style-name="Table_20_Contents">/<text:span text:style-name="T4">26</text:span></text:p>
          </table:table-cell>
          <table:table-cell table:style-name="Tabla1.A2" office:value-type="string">
            <text:p text:style-name="P6">172.16.3.68</text:p>
          </table:table-cell>
          <table:table-cell table:style-name="Tabla1.D2" office:value-type="string">
            <text:p text:style-name="P6">eth3</text:p>
          </table:table-cell>
        </table:table-row>
        <table:table-row>
          <table:table-cell table:style-name="Tabla1.A2" office:value-type="string">
            <text:p text:style-name="P6">0.0.0.0</text:p>
          </table:table-cell>
          <table:table-cell table:style-name="Tabla1.A2" office:value-type="string">
            <text:p text:style-name="Table_20_Contents">/<text:span text:style-name="T4">0</text:span></text:p>
          </table:table-cell>
          <table:table-cell table:style-name="Tabla1.A2" office:value-type="string">
            <text:p text:style-name="P6">172.16.3.74</text:p>
          </table:table-cell>
          <table:table-cell table:style-name="Tabla1.D2" office:value-type="string">
            <text:p text:style-name="P6">eth2</text:p>
          </table:table-cell>
        </table:table-row>
      </table:table>
      <text:p text:style-name="P3"/>
      <text:p text:style-name="P3">b)</text:p>
      <text:p text:style-name="P3">Cambiaria el default gateway al router a para que mande las solicitudes a internet mediante isp1</text:p>
      <text:p text:style-name="P3">(habria que revisar la sumarizacion)</text:p>
      <text:p text:style-name="P3"/>
      <text:p text:style-name="P3"/>
      <text:p text:style-name="P3">--------------------------------------------------------------------------\</text:p>
      <text:p text:style-name="P3"/>
      <text:p text:style-name="P3">3)</text:p>
      <text:p text:style-name="P3">redd.com.ar 86400 IN NS ns.redd.com.ar</text:p>
      <text:p text:style-name="P3">redd.com.ar 86400 IN MX 5 smtp.redd.com.ar</text:p>
      <text:p text:style-name="P3">redd.com.ar 86400 IN A mail.redd.com.ar</text:p>
      <text:p text:style-name="P3"/>
      <text:p text:style-name="P3">ns.redd.com.ar IN A 191.8.0.4</text:p>
      <text:p text:style-name="P3">smtp.redd.com.ar IN A 191.8.0.5</text:p>
      <text:p text:style-name="P3">mail.redd.com.ar IN A 191.8.0.6</text:p>
      <text:p text:style-name="P3"/>
      <text:p text:style-name="P3">usando pop3 para ahorrar recursos (del servidor, no de las computadoras)</text:p>
      <text:p text:style-name="P3"/>
      <text:p text:style-name="P3">desventajas: los correos se descargan en un dispositivo, por lo que si se agregara en un futuro mas computadoras a la red no se podria a acceder a correos que esten descargados en otro dispositivo.</text:p>
      <text:p text:style-name="P3">--------------------------------------------------------------------------\</text:p>
      <text:p text:style-name="P3">4)</text:p>
      <text:p text:style-name="P3"><draw:frame draw:style-name="fr1" draw:name="Imagen2" text:anchor-type="char" svg:x="0.113cm" svg:y="0.079cm" svg:width="16.485cm" svg:height="7.165cm" draw:z-index="18"><draw:image xlink:href="Pictures/10000001000002E100000158E0F00230A64082D9.png" xlink:type="simple" xlink:show="embed" xlink:actuate="onLoad" draw:mime-type="image/png"/></draw:frame></text:p>
      <text:p text:style-name="P3"><text:soft-page-break/></text:p>
      <text:p text:style-name="P3">Cliente (ISN: 2000) Servidor (ISN: 3999) </text:p>
      <text:p text:style-name="P3"/>
      <text:p text:style-name="P3">|----- SEQ=(2000 ) ACK=0 LEN=( 0 ) WIN=300 SYN=1 ---&gt; | </text:p>
      <text:p text:style-name="P3"/>
      <text:p text:style-name="P3">|&lt;---- SEQ=(3999) ACK=( 2001 ) LEN=0 WIN=100 SYN=( 1) ---- | </text:p>
      <text:p text:style-name="P3"/>
      <text:p text:style-name="P3">|----- SEQ=2001 ACK=4000 LEN=0 WIN=(300) SYN=( 1) -&gt; | </text:p>
      <text:p text:style-name="P3"/>
      <text:p text:style-name="P3">50 |&lt;----- SEQ=( 4000) ACK=( 2001) LEN=( 50) WIN=( 100) ---- | </text:p>
      <text:p text:style-name="P3"/>
      <text:p text:style-name="P3">|----- SEQ=( 2001) ACK=4050 LEN=100 WIN=( 300) ---&gt; | 25 </text:p>
      <text:p text:style-name="P3"/>
      <text:p text:style-name="P3">100 |&lt;----- SEQ=(4050 ) ACK=(2101 ) LEN=150 WIN=( 25) ---- | 75 </text:p>
      <text:p text:style-name="P3"/>
      <text:p text:style-name="P3">50 |----- SEQ=( 2101) ACK=( 4200) LEN=0 WIN=(250 ) FIN=1 ---&gt; | </text:p>
      <text:p text:style-name="P3"/>
      <text:p text:style-name="P3">|&lt;----- SEQ=( 4200) ACK=( 2101) LEN=0 WIN=(100 ) FIN=1 —--- | </text:p>
      <text:p text:style-name="P3"/>
      <text:p text:style-name="P3">-------------------------------------------------</text:p>
      <text:p text:style-name="P3">5)</text:p>
      <text:p text:style-name="P3">2a:e5:8d:96:9a:b4</text:p>
      <text:p text:style-name="P3">invertimos el 7mo bit 2a → 28</text:p>
      <text:p text:style-name="P3"/>
      <text:p text:style-name="P3">agregamos ff:fe en el medio → 28e5:8dff:fe96:9ab4</text:p>
      <text:p text:style-name="P3"/>
      <text:p text:style-name="P4"><text:span text:style-name="T4">agregamos el prefijo del RA → </text:span>2901:ccee:<text:span text:style-name="T4">28e5:8dff:fe96:9ab4/64</text:span></text:p>
      <text:p text:style-name="P3"/>
      <text:p text:style-name="P3"/>
      <text:p text:style-name="P3">----------------------------------------------------</text:p>
      <text:p text:style-name="P3">6)</text:p>
      <text:p text:style-name="P3">PC-A no puede enviar un ARP tipo broadcast para obtener directamente la mac de pc-f, asi que busca obtener la mac de su default gateway para que este lo pase entre dispositivos intermedios que se encargaran de enviarlo a destino. Los ARP Request y Reply al salir de RT-A es:</text:p>
      <text:p text:style-name="P5">ARP Request:</text:p>
      <text:p text:style-name="P3">ethernet:</text:p>
      <text:p text:style-name="P3">mac-destino → ff:ff:ff:ff:ff:ff:ff:ff</text:p>
      <text:p text:style-name="P3">mac-origen → MAC_RT-A</text:p>
      <text:p text:style-name="P3">ARP Packet:</text:p>
      <text:p text:style-name="P3">ip-origen: 172.16.3.65/30</text:p>
      <text:p text:style-name="P3">ip-destino: 172.16.3.66/30</text:p>
      <text:p text:style-name="P3">mac-origen: MAC_RT-A</text:p>
      <text:p text:style-name="P3">mac-destino: 00:00:00:00:00:00:00:00</text:p>
      <text:p text:style-name="P5">ARP Reply:</text:p>
      <text:p text:style-name="P5"><text:span text:style-name="T3">ethernet:</text:span></text:p>
      <text:p text:style-name="P5"><text:span text:style-name="T3">mac-destino: MAC_RT-A</text:span></text:p>
      <text:p text:style-name="P5"><text:span text:style-name="T3">mac-origen: MAC_RT-B</text:span></text:p>
      <text:p text:style-name="P5"><text:span text:style-name="T3">ARP Packet:</text:span></text:p>
      <text:p text:style-name="P5"><text:span text:style-name="T3">ip-origen: 172.16.3.66/30</text:span></text:p>
      <text:p text:style-name="P5"><text:span text:style-name="T3">ip-destino: 172.16.3.65/30</text:span></text:p>
      <text:p text:style-name="P5"><text:span text:style-name="T3">mac-origen: MAC_RT-B</text:span></text:p>
      <text:p text:style-name="P5"><text:span text:style-name="T3">mac-destino: MAC_RT-A</text:span></text:p>
      <text:p text:style-name="P5"><text:soft-page-break/><text:span text:style-name="T3">7)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6">MAC</text:p>
          </table:table-cell>
          <table:table-cell table:style-name="Tabla2.B1" office:value-type="string">
            <text:p text:style-name="P6">puerto</text:p>
          </table:table-cell>
        </table:table-row>
        <table:table-row>
          <table:table-cell table:style-name="Tabla2.A2" office:value-type="string">
            <text:p text:style-name="P6">RT-B</text:p>
          </table:table-cell>
          <table:table-cell table:style-name="Tabla2.B2" office:value-type="string">
            <text:p text:style-name="P6">e0</text:p>
          </table:table-cell>
        </table:table-row>
      </table:table>
      <text:p text:style-name="P3"/>
      <text:p text:style-name="P3">8) Responder V o F y justificar en ambos casos</text:p>
      <text:p text:style-name="P3">A) Un segmento TCP con errores se descarta, cuando vence su RTO el emisor volverá a enviarlo. V</text:p>
      <text:p text:style-name="P3"><text:tab/>Cuando un segmento TCP se descarta porque presenta errores, el emisor si no recibe una respuesta y se termina el RTO, el emisor vuelve a enviar el segmento.</text:p>
      <text:p text:style-name="P3">B) La saturación de buffers de un router disparará el control de flujo entre el emisor y receptor. F</text:p>
      <text:p text:style-name="P3"><text:tab/>Eso corresponde al control de congestion.</text:p>
      <text:p text:style-name="P3">C) El registro SOA de un dominio indica entre otros datos la última actualización, TTL por defecto para los registros y el DNS primario. F</text:p>
      <text:p text:style-name="P3"><text:tab/>No indica ninguno de esos datos.</text:p>
      <text:p text:style-name="P3">D) Hay casos en los que UDP responde con un protocolo auxiliar. V</text:p>
      <text:p text:style-name="P3"><text:tab/>UDP utiliza ICMP para responder por ejemplo cuando no se puede conectar con el servidor</text:p>
      <text:p text:style-name="P3">E) Los headers en HTTP permiten optar la versión HTTP deseada del requerimiento. F</text:p>
      <text:p text:style-name="P3"><text:tab/>El tipo de version de http no se opta en el header sino al comienzo del requerimien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7:39:56.736000000</meta:creation-date>
    <dc:date>2024-02-07T12:38:26.427000000</dc:date>
    <meta:editing-duration>PT4H58M30S</meta:editing-duration>
    <meta:editing-cycles>3</meta:editing-cycles>
    <meta:generator>LibreOffice/7.6.2.1$Windows_X86_64 LibreOffice_project/56f7684011345957bbf33a7ee678afaf4d2ba333</meta:generator>
    <meta:document-statistic meta:table-count="2" meta:image-count="2" meta:object-count="0" meta:page-count="4" meta:paragraph-count="121" meta:word-count="692" meta:character-count="4497" meta:non-whitespace-character-count="3915"/>
  </office:meta>
</office:document-meta>
</file>