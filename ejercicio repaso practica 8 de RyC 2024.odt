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578e1"/>
    </style:style>
    <style:style style:name="P2" style:family="paragraph" style:parent-style-name="Standard">
      <style:text-properties officeooo:rsid="000578e1" officeooo:paragraph-rsid="000578e1"/>
    </style:style>
    <style:style style:name="T1" style:family="text">
      <style:text-properties officeooo:rsid="000578e1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1.A)</text:p>
      <text:p text:style-name="P1"/>
      <text:p text:style-name="P1">PC-A (ss) </text:p>
      <text:p text:style-name="P1">Local Address:Port <text:tab/><text:tab/><text:tab/>Peer Address:Port </text:p>
      <text:p text:style-name="P1">192.168.1.2:49273 <text:tab/><text:tab/><text:tab/><text:span text:style-name="T2">190.50.10.63:80</text:span></text:p>
      <text:p text:style-name="P1"><text:span text:style-name="T3">192.168.1.2:37484</text:span> <text:tab/><text:tab/><text:tab/>190.50.10.63:25</text:p>
      <text:p text:style-name="P1">192.168.1.2:<text:span text:style-name="T3">51238</text:span><text:tab/><text:tab/><text:tab/>190.50.10.81:8080</text:p>
      <text:p text:style-name="P1"/>
      <text:p text:style-name="P1">PC-B (ss)</text:p>
      <text:p text:style-name="P1">Local Address:Port <text:tab/><text:tab/><text:tab/>Peer Address:Port </text:p>
      <text:p text:style-name="P1">192.168.1.3:52734 <text:tab/><text:tab/><text:tab/><text:span text:style-name="T3">190.50.10.81:8081</text:span><text:tab/></text:p>
      <text:p text:style-name="P1">192.168.1.3:39275 <text:tab/><text:tab/><text:tab/><text:span text:style-name="T3">190.50.10.81:8080</text:span></text:p>
      <text:p text:style-name="P2"/>
      <text:p text:style-name="P1">RTR-1 (Tabla de NAT) </text:p>
      <text:p text:style-name="P1">Lado LAN <text:tab/><text:tab/><text:tab/><text:tab/>Lado WAN </text:p>
      <text:p text:style-name="P1">192.168.1.2:49273 <text:tab/><text:tab/><text:tab/>205.20.0.29:25192 </text:p>
      <text:p text:style-name="P1">192.168.1.2:51238 <text:tab/><text:tab/><text:tab/><text:span text:style-name="T3">205.20.0.29:9123</text:span></text:p>
      <text:p text:style-name="P1">192.168.1.3:52734 <text:tab/><text:tab/><text:tab/>205.20.0.29:51091</text:p>
      <text:p text:style-name="P1">192.168.1.2:37484 <text:tab/><text:tab/><text:tab/>205.20.0.29:41823 </text:p>
      <text:p text:style-name="P1">192.168.1.3:39275 <text:tab/><text:tab/><text:tab/>205.20.0.29:9123 </text:p>
      <text:p text:style-name="P1"/>
      <text:p text:style-name="P1">SRV-A (ss) </text:p>
      <text:p text:style-name="P1">Local Address:Port <text:tab/><text:tab/><text:tab/>Peer Address:Port </text:p>
      <text:p text:style-name="P1">190.50.10.63:80 <text:tab/><text:tab/><text:tab/>205.20.0.29:25192 </text:p>
      <text:p text:style-name="P1">190.50.10.63:25 <text:tab/><text:tab/><text:tab/>205.20.0.29:41823 </text:p>
      <text:p text:style-name="P1"/>
      <text:p text:style-name="P1">SRV-B (ss) </text:p>
      <text:p text:style-name="P1">Local Address:Port <text:tab/><text:tab/><text:tab/>Peer Address:Port </text:p>
      <text:p text:style-name="P1">190.50.10.81:8080 <text:tab/><text:tab/><text:tab/>205.20.0.29:16345 </text:p>
      <text:p text:style-name="P1">190.50.10.81:8081 <text:tab/><text:tab/><text:tab/>205.20.0.29:51091 </text:p>
      <text:p text:style-name="P1">190.50.10.81:8080 <text:tab/><text:tab/><text:tab/>205.20.0.29:9123</text:p>
      <text:p text:style-name="P1"/>
      <text:p text:style-name="P2">12.B)</text:p>
      <text:p text:style-name="P2">i) Hay 5 conexiones establecidas entre los dispositivos PC-A, PC-B, SRV-A y SRV-B</text:p>
      <text:p text:style-name="P2">ii) Las iniciaron PC-A y PC-B. No puede haberse iniciado en sentido inverso porque se conectan a puertos reservados.</text:p>
      <text:p text:style-name="P2">Port-Forwarding:</text:p>
      <text:p text:style-name="P2">si queremos que SRV-A o SRV-B puedan iniciar una conexión hacia PC-A en el puerto 49273, configuraríamos una regla que redirija el tráfico recibido en ese puerto en la IP pública del enrutador (205.20.0.29:49273) hacia 192.168.1.2:49273. </text:p>
      <text:p text:style-name="P1"><text:span text:style-name="T1">Ademas, </text:span>es necesario que las PCs tengan configurado algún servicio escuchando en un puerto específico, como 49273, o cualquier otro puerto que el port-forwarding redirija. Una vez configurado el port-forwarding, cuando SRV-A o SRV-B envíen un paquete dirigido a 205.20.0.29 en el puerto específico, el enrutador reenviará ese tráfico hacia la PC correspondiente en la LAN.</text:p>
      <text:p text:style-name="P1">Esto habilitaría la conexión inversa, permitiendo que SRV-A o SRV-B inicien una conexión directamente a las PCs de la red interna (PC-A o PC-B) sin que las PCs necesiten iniciar la comunicación primer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8:32:05.400000000</meta:creation-date>
    <dc:date>2024-11-11T18:51:50.028000000</dc:date>
    <meta:editing-duration>PT19M46S</meta:editing-duration>
    <meta:editing-cycles>1</meta:editing-cycles>
    <meta:document-statistic meta:table-count="0" meta:image-count="0" meta:object-count="0" meta:page-count="1" meta:paragraph-count="33" meta:word-count="222" meta:character-count="1846" meta:non-whitespace-character-count="1578"/>
    <meta:generator>LibreOffice/7.6.5.2$Windows_X86_64 LibreOffice_project/38d5f62f85355c192ef5f1dd47c5c0c0c6d6598b</meta:generator>
  </office:meta>
</office:document-meta>
</file>