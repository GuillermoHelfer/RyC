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E0000014E6BD3CD61.png" manifest:media-type="image/png"/>
  <manifest:file-entry manifest:full-path="Pictures/10000001000001CA000001CD4197522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style:writing-mode="page"/>
    </style:style>
    <style:style style:name="P1" style:family="paragraph" style:parent-style-name="Standard">
      <style:text-properties officeooo:paragraph-rsid="001f6f4f"/>
    </style:style>
    <style:style style:name="P2" style:family="paragraph" style:parent-style-name="Standard">
      <style:text-properties officeooo:rsid="001f6f4f" officeooo:paragraph-rsid="001f6f4f"/>
    </style:style>
    <style:style style:name="P3" style:family="paragraph" style:parent-style-name="Table_20_Contents">
      <style:text-properties officeooo:rsid="001f6f4f" officeooo:paragraph-rsid="001f6f4f"/>
    </style:style>
    <style:style style:name="P4" style:family="paragraph" style:parent-style-name="Table_20_Contents">
      <style:text-properties fo:font-weight="bold" officeooo:rsid="001f6f4f" officeooo:paragraph-rsid="001f6f4f" style:font-weight-asian="bold" style:font-weight-complex="bold"/>
    </style:style>
    <style:style style:name="P5" style:family="paragraph" style:parent-style-name="Standard">
      <style:text-properties officeooo:rsid="001f6f4f" officeooo:paragraph-rsid="001f6f4f"/>
    </style:style>
    <style:style style:name="P6" style:family="paragraph" style:parent-style-name="Standard">
      <style:text-properties style:text-underline-style="none"/>
    </style:style>
    <style:style style:name="T1" style:family="text">
      <style:text-properties officeooo:rsid="001f6f4f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Imagen1" text:anchor-type="char" svg:x="0.266cm" svg:y="0.085cm" svg:width="10.795cm" svg:height="7.07cm" draw:z-index="0"><draw:image xlink:href="Pictures/10000001000001FE0000014E6BD3CD6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a) El servidor unlp.unlp.edu.ar perdió conectividad con Internet. PC-A accede mediante un navegador a www.unlp.edu.ar. </text:p>
      <text:p text:style-name="P1">i) ¿Qué respuestas TCP y HTTP obtendrá PC-A por parte del servidor?</text:p>
      <text:p text:style-name="P2">Ninguna porque no se puede conectar.</text:p>
      <text:p text:style-name="P2">End of TTL Time exceeded</text:p>
      <text:p text:style-name="P1">ii) ¿Podría obtenerse de algún servidor DNS información autoritativa sobre el nombre unlp.edu.ar?</text:p>
      <text:p text:style-name="P1"/>
      <text:p text:style-name="P1">b) El servidor unlp.unlp.edu.ar recuperó conectividad con Internet y se plantean mejoras a las que deberá indicar qué modificaciones son necesarias realizar tanto en la topología como las configuraciones (de red y registros DNS): </text:p>
      <text:p text:style-name="P1">i) Incorporar en la Red A un segundo servidor DNS autoritativo para unlp.edu.ar.</text:p>
      <text:p text:style-name="P2">Agregar un dominio NS para el nuevo servidor ns1.unlp.edu.ar</text:p>
      <text:p text:style-name="P1">ii) Incorporar en la misma red un servidor de correo saliente que será utilizado por la aplicación <text:a xlink:type="simple" xlink:href="http://www.unlp.edu.ar/" text:style-name="Internet_20_link" text:visited-style-name="Visited_20_Internet_20_Link">www.unlp.edu.ar</text:a>.</text:p>
      <text:p text:style-name="P2">Agregar un dominio A mail.unlp.edu.ar y un cname para la aplicación www.unlp.edu.ar</text:p>
      <text:p text:style-name="P1">iii) Incorporar en la misma red dos servidores (mail-uno y mail-dos) de correo entrante para los usuarios del dominio unlp.edu.ar. Mail-dos debe recibir los correos solo si mail-uno se encuentra fuera de servicio.</text:p>
      <text:p text:style-name="P2">Servidor A mail1.redes.</text:p>
      <text:p text:style-name="P2">Agregar dos dominios MX con prioridades 5 y 10 respectivamente</text:p>
      <text:p text:style-name="P1">iv) Ayudar a servidores de correo de otros dominios a identificar servidores de correo autorizados para el envío de correo bajo el dominio unlp.edu.ar.</text:p>
      <text:p text:style-name="P1"/>
      <text:p text:style-name="P2">2)b.</text:p>
      <text:p text:style-name="P2">seq= 1000 ack= 0 <text:tab/>flags:SYN len: 0→ </text:p>
      <text:p text:style-name="P2"><text:tab/><text:tab/><text:tab/><text:tab/><text:tab/> <text:s text:c="2"/>← seq=2000 ack=1001 flags: SYN-ACK len: 0</text:p>
      <text:p text:style-name="P2">seq= 1001 ack= 2001 flags:ACK len: 0→</text:p>
      <text:p text:style-name="P2">seq= 1002 ack= 2001 flags: len: 20 <text:s text:c="5"/>→ </text:p>
      <text:p text:style-name="P2"><text:tab/><text:tab/><text:tab/><text:tab/><text:tab/> <text:s text:c="2"/>← seq=2001 ack 1022 flags: ACK len: 0</text:p>
      <text:p text:style-name="P2">seq= 1023 ack= 2001 flags: len: 30 <text:s text:c="5"/>→ </text:p>
      <text:p text:style-name="P2">seq= 1024 ack= 2001 flags: len: 30 <text:s text:c="5"/>→ </text:p>
      <text:p text:style-name="P2"><text:tab/><text:tab/><text:tab/><text:tab/><text:tab/> <text:s text:c="2"/>← seq=2001 ack 1022 flags: ACK len: 0</text:p>
      <text:p text:style-name="P2">seq= 1025 ack= 2001 flags: len: 50 <text:s text:c="5"/>→ </text:p>
      <text:p text:style-name="P2"><text:tab/><text:tab/><text:tab/><text:tab/><text:tab/> <text:s text:c="2"/>← seq=2001 ack 1022 flags: ACK len: 0</text:p>
      <text:p text:style-name="P2"/>
      <text:p text:style-name="P2"/>
      <text:p text:style-name="P2"><text:soft-page-break/>2).c</text:p>
      <text:p text:style-name="P2">seq= 1000 ack= 0 <text:tab/>flags:SYN len: 0→ </text:p>
      <text:p text:style-name="P2"><text:tab/><text:tab/><text:tab/><text:tab/><text:tab/> <text:s/>← seq=2000 ack=1001 flags: RST len: 0</text:p>
      <text:p text:style-name="P2"/>
      <text:p text:style-name="P1"><draw:frame draw:style-name="fr1" draw:name="Imagen2" text:anchor-type="char" svg:x="0.711cm" svg:y="0.042cm" svg:width="9.694cm" svg:height="9.758cm" draw:z-index="1"><draw:image xlink:href="Pictures/10000001000001CA000001CD4197522A.png" xlink:type="simple" xlink:show="embed" xlink:actuate="onLoad" draw:mime-type="image/png"/></draw:frame><text:span text:style-name="T1">3)</text:span> La siguiente organización dispone de dos bloques de direcciones libres: el primero es 190.10.2.0/23 y solo en caso agotarse disponible de un segundo bloque de direcciones 180.0.0.0/26. Asigne direcciones a todas las redes utilizando VLSM.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imer Bloque = 190.10.2.0/23</text:p>
      <text:p text:style-name="P2">/23 = 255.255.11111110.00000000</text:p>
      <text:p text:style-name="P2"/>
      <text:p text:style-name="P2">Red A necesita 150 hosts por lo que precisara de al menos 152 direcciones. 8 bits son necesarios.</text:p>
      <text:p text:style-name="P2">Tomamos 1 bits para subnetear y dejamos el resto para hosts.</text:p>
      <text:p text:style-name="P2">Nueva mascara: 255.255.255.0 = /24</text:p>
      <text:p text:style-name="P2">tomamos la siguiente direccion libre</text:p>
      <text:p text:style-name="P2">190.10.0000001|0|.00000000 = 190.10.2.0/24 → Asignada a Red A</text:p>
      <text:p text:style-name="P2">190.10.0000001|1|.00000000 = 190.10.3.0/24 → libre</text:p>
      <text:p text:style-name="P2"/>
      <text:p text:style-name="P2">-----------------------------------------------</text:p>
      <text:p text:style-name="P2">Red B necesita 110 hosts por lo que precisara de al menos 112 direcciones. 7 bits son necesarios</text:p>
      <text:p text:style-name="P2">Tomamos 1 bit para subnetear y dejamos el resto para hosts.</text:p>
      <text:p text:style-name="P2">nueva mascara: 255.2555.255.128 = /25</text:p>
      <text:p text:style-name="P2">tomamos la siguiente direccion libre</text:p>
      <text:p text:style-name="P2">190.10.00000011.|0|0000000 = 190.10.3.0/25 → Asignada a Red B</text:p>
      <text:p text:style-name="P2">190.10.00000011.|1|0000000 = 190.10.3.128/25 → libre</text:p>
      <text:p text:style-name="P2"/>
      <text:p text:style-name="P2">-----------------------------------------------</text:p>
      <text:p text:style-name="P2">Red E necesita 47 hosts por lo que precisara de al menos 49 direcciones. 6 bits son necesarios</text:p>
      <text:p text:style-name="P2">Tomamos 1 bit para subnetear y dejamos el resto para hosts.</text:p>
      <text:p text:style-name="P2">Nueva mascara = 255.255.255.192 = /26</text:p>
      <text:p text:style-name="P2">tomamos la siguiente direccion libre</text:p>
      <text:p text:style-name="P2">190.10.00000011.1|0|000000 = 190.10.3.128/26 → Asignada a Red E</text:p>
      <text:p text:style-name="P2">190.10.00000011.1|1|000000 = 190.10.3.192/26 → libre</text:p>
      <text:p text:style-name="P2"/>
      <text:p text:style-name="P2">-----------------------------------------------</text:p>
      <text:p text:style-name="P2"><text:soft-page-break/>Red D necesita 31 hosts por lo que precisara de al menos 33 direcciones. 6 bits son necesarios</text:p>
      <text:p text:style-name="P2">tomamos la siguiente direccion libre</text:p>
      <text:p text:style-name="P2">190.10.00000011.1|1|000000 = 190.10.3.192/26 → Asignada a Red D</text:p>
      <text:p text:style-name="P2"/>
      <text:p text:style-name="P2">-----------------------------------------------</text:p>
      <text:p text:style-name="P2">Para las conexiones entre los routers nos quedamos sin direcicones libres en el primer bloque asi que usamos el segundo bloque (180.0.0.0/26)</text:p>
      <text:p text:style-name="P2">mascara actual → 255.255.255.192 = 255.255.255.11000000</text:p>
      <text:p text:style-name="P2"/>
      <text:p text:style-name="P2">tomamos 4 bits para subnetear y el resto para hosts</text:p>
      <text:p text:style-name="P2">la nueva mascara es /30 = 255.255.255.11111100</text:p>
      <text:p text:style-name="P2">180.0.0.00|0000|00 = 180.0.0.0 asignada a RtrA – RtrE</text:p>
      <text:p text:style-name="P2">180.0.0.00|0001|00 = 180.0.0.4 → asignada a RtrE – RtrD</text:p>
      <text:p text:style-name="P2">180.0.0.00|0010|00 = 180.0.0.8 → asignada a RtrD – RtrA</text:p>
      <text:p text:style-name="P2">180.0.0.00|0011|00 = 180.0.0.16 → libre</text:p>
      <text:p text:style-name="P2">180.0.0.00|0011|00 = 180.0.0.20 → libre</text:p>
      <text:p text:style-name="P2"><text:tab/> <text:s text:c="2"/>. . . <text:s text:c="11"/>→ libres</text:p>
      <text:p text:style-name="P2">180.0.0.00|1111|00 = 180.0.0.60 <text:s/>→ libre</text:p>
      <text:p text:style-name="P2"/>
      <text:p text:style-name="P2">4)</text:p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3">DIRECCION</text:p>
          </table:table-cell>
          <table:table-cell table:style-name="Tabla1.A1" office:value-type="string">
            <text:p text:style-name="P4">MASCARA<text:span text:style-name="T2"/></text:p>
          </table:table-cell>
          <table:table-cell table:style-name="Tabla1.A1" office:value-type="string">
            <text:p text:style-name="P3">NEXT-HOP</text:p>
          </table:table-cell>
          <table:table-cell table:style-name="Tabla1.A1" office:value-type="string">
            <text:p text:style-name="P3">INTERFACE</text:p>
          </table:table-cell>
        </table:table-row>
        <table:table-row>
          <table:table-cell table:style-name="Tabla1.A1" office:value-type="string">
            <text:p text:style-name="P3">180.0.0.0</text:p>
          </table:table-cell>
          <table:table-cell table:style-name="Tabla1.A1" office:value-type="string">
            <text:p text:style-name="Table_20_Contents">/<text:span text:style-name="T1">30</text:span></text:p>
          </table:table-cell>
          <table:table-cell table:style-name="Tabla1.A1" office:value-type="string">
            <text:p text:style-name="P3">180.0.0.1</text:p>
          </table:table-cell>
          <table:table-cell table:style-name="Tabla1.A1" office:value-type="string">
            <text:p text:style-name="P3">eth0</text:p>
          </table:table-cell>
        </table:table-row>
        <table:table-row>
          <table:table-cell table:style-name="Tabla1.A1" office:value-type="string">
            <text:p text:style-name="P3">180.0.0.4</text:p>
          </table:table-cell>
          <table:table-cell table:style-name="Tabla1.A1" office:value-type="string">
            <text:p text:style-name="Table_20_Contents">/<text:span text:style-name="T1">30</text:span></text:p>
          </table:table-cell>
          <table:table-cell table:style-name="Tabla1.A1" office:value-type="string">
            <text:p text:style-name="P3">180.0.0.5</text:p>
          </table:table-cell>
          <table:table-cell table:style-name="Tabla1.A1" office:value-type="string">
            <text:p text:style-name="P3">eth1</text:p>
          </table:table-cell>
        </table:table-row>
        <table:table-row>
          <table:table-cell table:style-name="Tabla1.A1" office:value-type="string">
            <text:p text:style-name="P3">180.0.0.8</text:p>
          </table:table-cell>
          <table:table-cell table:style-name="Tabla1.A1" office:value-type="string">
            <text:p text:style-name="Table_20_Contents">/<text:span text:style-name="T1">30</text:span></text:p>
          </table:table-cell>
          <table:table-cell table:style-name="Tabla1.A1" office:value-type="string">
            <text:p text:style-name="P3">180.0.0.5</text:p>
          </table:table-cell>
          <table:table-cell table:style-name="Tabla1.A1" office:value-type="string">
            <text:p text:style-name="P3">eth1</text:p>
          </table:table-cell>
        </table:table-row>
        <table:table-row>
          <table:table-cell table:style-name="Tabla1.A1" office:value-type="string">
            <text:p text:style-name="P2">190.10.3.0</text:p>
          </table:table-cell>
          <table:table-cell table:style-name="Tabla1.A1" office:value-type="string">
            <text:p text:style-name="Table_20_Contents">/<text:span text:style-name="T1">25</text:span></text:p>
          </table:table-cell>
          <table:table-cell table:style-name="Tabla1.A1" office:value-type="string">
            <text:p text:style-name="P3">180.0.0.1</text:p>
          </table:table-cell>
          <table:table-cell table:style-name="Tabla1.A1" office:value-type="string">
            <text:p text:style-name="P3">eth0</text:p>
          </table:table-cell>
        </table:table-row>
        <table:table-row>
          <table:table-cell table:style-name="Tabla1.A1" office:value-type="string">
            <text:p text:style-name="P2">190.10.2.0</text:p>
          </table:table-cell>
          <table:table-cell table:style-name="Tabla1.A1" office:value-type="string">
            <text:p text:style-name="Table_20_Contents">/<text:span text:style-name="T1">24</text:span></text:p>
          </table:table-cell>
          <table:table-cell table:style-name="Tabla1.A1" office:value-type="string">
            <text:p text:style-name="P3">180.0.0.5</text:p>
          </table:table-cell>
          <table:table-cell table:style-name="Tabla1.A1" office:value-type="string">
            <text:p text:style-name="P3">eth1</text:p>
          </table:table-cell>
        </table:table-row>
        <table:table-row>
          <table:table-cell table:style-name="Tabla1.A1" office:value-type="string">
            <text:p text:style-name="P2">190.10.3.128</text:p>
          </table:table-cell>
          <table:table-cell table:style-name="Tabla1.A1" office:value-type="string">
            <text:p text:style-name="Table_20_Contents">/<text:span text:style-name="T1">26</text:span></text:p>
          </table:table-cell>
          <table:table-cell table:style-name="Tabla1.A1" office:value-type="string">
            <text:p text:style-name="P3">-</text:p>
          </table:table-cell>
          <table:table-cell table:style-name="Tabla1.A1" office:value-type="string">
            <text:p text:style-name="P3">eth2</text:p>
          </table:table-cell>
        </table:table-row>
        <table:table-row>
          <table:table-cell table:style-name="Tabla1.A1" office:value-type="string">
            <text:p text:style-name="P2">190.10.3.192</text:p>
          </table:table-cell>
          <table:table-cell table:style-name="Tabla1.A1" office:value-type="string">
            <text:p text:style-name="Table_20_Contents">/<text:span text:style-name="T1">26</text:span>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P3">eth3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6T15:06:45.864000000</meta:creation-date>
    <dc:date>2024-07-04T12:15:05.668000000</dc:date>
    <meta:editing-duration>P1DT3H57M23S</meta:editing-duration>
    <meta:editing-cycles>2</meta:editing-cycles>
    <meta:generator>LibreOffice/7.6.5.2$Windows_X86_64 LibreOffice_project/38d5f62f85355c192ef5f1dd47c5c0c0c6d6598b</meta:generator>
    <meta:document-statistic meta:table-count="1" meta:image-count="2" meta:object-count="0" meta:page-count="3" meta:paragraph-count="100" meta:word-count="656" meta:character-count="4381" meta:non-whitespace-character-count="3736"/>
  </office:meta>
</office:document-meta>
</file>