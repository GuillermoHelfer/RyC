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CodePro-Regular" svg:font-family="SourceCodePro-Regular" style:font-family-generic="roman" style:font-pitch="variable"/>
  </office:font-face-decls>
  <office:automatic-styles>
    <style:style style:name="P1" style:family="paragraph" style:parent-style-name="Standard">
      <style:text-properties officeooo:rsid="00081268" officeooo:paragraph-rsid="00081268"/>
    </style:style>
    <style:style style:name="T1" style:family="text">
      <style:text-properties style:font-name="ArialMT" fo:font-size="9pt" style:font-size-asian="9pt"/>
    </style:style>
    <style:style style:name="T2" style:family="text">
      <style:text-properties style:font-name="SourceCodePro-Regular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b) se trata de http1.1 porque soporta una misma conexión y los datos viajan por pipelining.</text:p>
      <text:p text:style-name="P1"/>
      <text:p text:style-name="P1">c) mail1 y mail2 utilizaran smtp y pop3 para ahorrar almacenamiento en los servidores. Mail2 usara el ns-res y mail1 usara el ns1</text:p>
      <text:p text:style-name="P1"/>
      <text:p text:style-name="P1">d) es probable que el archivo sea muy grande para pc-d, podria solicitarlo en partes/achicar su ventana.</text:p>
      <text:p text:style-name="P1"/>
      <text:p text:style-name="P1">2)</text:p>
      <text:p text:style-name="P1">a) Esta indicando que el emisor no tiene espacio para recibir mas datos.</text:p>
      <text:p text:style-name="P1"/>
      <text:p text:style-name="P1">b) Si podria establecer una nueva conexión porque lo hace desde una ip y puerto que aun no se ha establecido conexión con ese destinatario.</text:p>
      <text:p text:style-name="P1"/>
      <text:p text:style-name="P1">c) Si es una conexión udp tipica, el mensaje se pierde y no se retransmite, en caso de que se este utilizando dhcp podria intentar reenviar el mensaje.</text:p>
      <text:p text:style-name="P1"/>
      <text:p text:style-name="P1">3. Dados los siguientes paquetes obtenidos de una captura, indique cuál sería el datagrama/segmento previo a cada uno de ellos (incluya toda la información posible: protocolo, direcciones IP, puertos, flags y números de secuencia y confirmación):</text:p>
      <text:p text:style-name="P1">a. 192.168.8.15.9999 &gt; 192.168.8.253.16367: Flags [RA], seq 0, ack 3230256111, win 0, length 0</text:p>
      <text:p text:style-name="P1">tcp 192.168.8.253.16367 &gt; 192.168.8.15.9999: Flags [A], seq 3230256111 ack= 0, win 0, length 0</text:p>
      <text:p text:style-name="P1">b. 127.0.0.1.1918 &gt; 127.0.0.1.9050: Flags [A], seq 1, ack 1, win 65495, length 0</text:p>
      <text:p text:style-name="P1">tcp 127.0.0.1.9050 &gt; 127.0.0.1.1918: Flags [S,A], seq 0, ack1, win 65495, length 0</text:p>
      <text:p text:style-name="P1">c. IP 192.168.8.15 &gt; 192.168.8.253 ICMP 192.168.8.15 port 9 unreachable, length 36</text:p>
      <text:p text:style-name="P1">udp 192.168.8.253:xx &gt; 192.168.8.15:9, length 36</text:p>
      <text:p text:style-name="P1"/>
      <text:p text:style-name="P1"/>
      <text:p text:style-name="P1">4) a) la capacidad maxima de clientes es de 5 (actualmente hay 3)</text:p>
      <text:p text:style-name="P1"/>
      <text:p text:style-name="P1">b) redClienteA necesita 18 hosts, por lo tanto al menos 20 direcciones,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CodePro-Regular" svg:font-family="SourceCodePro-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16:26:27.002000000</meta:creation-date>
    <dc:date>2024-02-07T17:31:22.664000000</dc:date>
    <meta:editing-duration>PT1H4M56S</meta:editing-duration>
    <meta:editing-cycles>1</meta:editing-cycles>
    <meta:document-statistic meta:table-count="0" meta:image-count="0" meta:object-count="0" meta:page-count="1" meta:paragraph-count="17" meta:word-count="258" meta:character-count="1552" meta:non-whitespace-character-count="1311"/>
    <meta:generator>LibreOffice/7.6.2.1$Windows_X86_64 LibreOffice_project/56f7684011345957bbf33a7ee678afaf4d2ba333</meta:generator>
  </office:meta>
</office:document-meta>
</file>