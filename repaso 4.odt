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48b" officeooo:paragraph-rsid="001bb48b"/>
    </style:style>
    <style:style style:name="P2" style:family="paragraph" style:parent-style-name="Standard">
      <style:text-properties officeooo:paragraph-rsid="001bb48b"/>
    </style:style>
    <style:style style:name="P3" style:family="paragraph" style:parent-style-name="Standard">
      <style:text-properties style:text-underline-style="none" officeooo:rsid="001bb48b" officeooo:paragraph-rsid="001bb48b"/>
    </style:style>
    <style:style style:name="P4" style:family="paragraph" style:parent-style-name="Standard">
      <style:text-properties style:text-underline-style="none" officeooo:rsid="001bb48b" officeooo:paragraph-rsid="001d2a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b48b" style:font-style-asian="normal" style:font-style-complex="normal"/>
    </style:style>
    <style:style style:name="T4" style:family="text">
      <style:text-properties fo:font-style="normal" officeooo:rsid="001d2aeb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mbas redes B y Servidores Sucursal necesitamos 6 bits para hosts.</text:p>
      <text:p text:style-name="P1">Tomamos entonces 10 bits para subnetear y asignamos el resto a hosts.</text:p>
      <text:p text:style-name="P1">Nueva mascara = /26</text:p>
      <text:p text:style-name="P1"/>
      <text:p text:style-name="P1">50.0.0.0/26 → asignada a red B</text:p>
      <text:p text:style-name="P1">50.0.0.64/26 → asignada a Servidores Sucursal</text:p>
      <text:p text:style-name="P1">50.0.0.128/26 → libre</text:p>
      <text:p text:style-name="P1">50.0.0.192/26 → libre</text:p>
      <text:p text:style-name="P1"><text:s text:c="8"/>. . .</text:p>
      <text:p text:style-name="P1"/>
      <text:p text:style-name="P1">----------------------------------------------------</text:p>
      <text:p text:style-name="P1"/>
      <text:p text:style-name="P1">EL RESTO NO SE ENTIENDE</text:p>
      <text:p text:style-name="P1"/>
      <text:p text:style-name="P1">----------------------------------------------------</text:p>
      <text:p text:style-name="P1"/>
      <text:p text:style-name="P1">3) a) <text:span text:style-name="T1">protocolo: </text:span><text:span text:style-name="T2">https // </text:span><text:span text:style-name="T1">server: </text:span><text:a xlink:type="simple" xlink:href="http://www.info.unlp.edu.ar/" text:style-name="Internet_20_link" text:visited-style-name="Visited_20_Internet_20_Link"><text:span text:style-name="T2">www.info.unlp.edu.ar</text:span></text:a><text:span text:style-name="T2"> // </text:span><text:span text:style-name="T1">recurso: </text:span><text:span text:style-name="T2">index.html</text:span></text:p>
      <text:p text:style-name="P1"><text:span text:style-name="T2"/></text:p>
      <text:p text:style-name="P1"><text:span text:style-name="T2">b) HTTP (p 80), se realiza una solicitud de tipo GET (-X) y pide informacion detallada (-v)</text:span></text:p>
      <text:p text:style-name="P1"><text:span text:style-name="T2"/></text:p>
      <text:p text:style-name="P1"><text:span text:style-name="T2">c) No se obtuvo el recurso solicitado porque la pagina solicitada se movio a otra ubicación.</text:span></text:p>
      <text:p text:style-name="P1"><text:span text:style-name="T2"/></text:p>
      <text:p text:style-name="P1"><text:span text:style-name="T2">d) No se puede determinar porque no esta el encabezado de Connection: Keep-Alive</text:span></text:p>
      <text:p text:style-name="P1"><text:span text:style-name="T2"/></text:p>
      <text:p text:style-name="P1"><text:span text:style-name="T2">----------------------------------------------------</text:span></text:p>
      <text:p text:style-name="P1"><text:span text:style-name="T2"/></text:p>
      <text:p text:style-name="P2"><text:span text:style-name="T3">4) a) Hay 5 conexiones establecidas (hay una cliente-servidor en la misma maquina). Actua como servidor en la conexión 211.10.2.2:25 porque es un puerto privilegiado y en </text:span><text:span text:style-name="T2">211.10.2.2:37610 </text:span><text:span text:style-name="T3">actua como servidor y cliente a la vez, en el resto actua como cliente</text:span></text:p>
      <text:p text:style-name="P1"><text:span text:style-name="T2"/></text:p>
      <text:p text:style-name="P1"><text:span text:style-name="T2">b) Respondera con SYN, ACK; puesto que el puerto esta en estado LISTEN.</text:span></text:p>
      <text:p text:style-name="P1"><text:span text:style-name="T2"/></text:p>
      <text:p text:style-name="P1"><text:span text:style-name="T2">c) Respondera con RST puesto que el puerto no esta en estado LISTEN.</text:span></text:p>
      <text:p text:style-name="P1"><text:span text:style-name="T2"/></text:p>
      <text:p text:style-name="P1"><text:span text:style-name="T2">d) Respondera con RST; puesto que el puerto esta escuchando en la direccion de loopback.</text:span></text:p>
      <text:p text:style-name="P1"><text:span text:style-name="T2"/></text:p>
      <text:p text:style-name="P1"><text:span text:style-name="T2">-----------------------------------------------------</text:span></text:p>
      <text:p text:style-name="P1"><text:span text:style-name="T2"/></text:p>
      <text:p text:style-name="P1"><text:span text:style-name="T2">5) a) seq= 10000 ack= 10000 flags: SYN → <text:s/></text:span></text:p>
      <text:p text:style-name="P1"><text:span text:style-name="T2"><text:s text:c="8"/>← seq= 10000 ack=10001 flags: SYN, ACK</text:span></text:p>
      <text:p text:style-name="P1"><text:span text:style-name="T2"><text:s text:c="8"/>seq= 10001 ack= 10001 flags: ACK →</text:span></text:p>
      <text:p text:style-name="P1"><text:span text:style-name="T2"/></text:p>
      <text:p text:style-name="P1"><text:span text:style-name="T2">b) <text:tab/>sn= 20000 ack=1000</text:span></text:p>
      <text:p text:style-name="P1"><text:span text:style-name="T2"><text:tab/>sn= 20000 ack=1000</text:span></text:p>
      <text:p text:style-name="P1"><text:span text:style-name="T2"><text:tab/>sn= 20000 ack=1000</text:span></text:p>
      <text:p text:style-name="P1"><text:span text:style-name="T2"><text:tab/>sn= 1000 ack= 20100</text:span></text:p>
      <text:p text:style-name="P1"><text:span text:style-name="T2"/></text:p>
      <text:p text:style-name="P1"><text:span text:style-name="T2">------------------------------------------------------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6) Luego de pasar por el primer router:</text:span></text:p>
      <text:p text:style-name="P1"><text:span text:style-name="T2"/></text:p>
      <text:p text:style-name="P1"><text:span text:style-name="T2">ARP-Request</text:span></text:p>
      <text:p text:style-name="P1"><text:span text:style-name="T2">mac-origen: MAC_RTRprimer</text:span></text:p>
      <text:p text:style-name="P1"><text:span text:style-name="T2">mac-destino: 00:00:00:00:00:00:00:00</text:span></text:p>
      <text:p text:style-name="P1"><text:span text:style-name="T2">ip-origen: IP_RTRprimer</text:span></text:p>
      <text:p text:style-name="P1"><text:span text:style-name="T2">ip-destino: IP_RTRsegundo</text:span></text:p>
      <text:p text:style-name="P1"><text:span text:style-name="T2"/></text:p>
      <text:p text:style-name="P1"><text:span text:style-name="T2">ARP-Reply</text:span></text:p>
      <text:p text:style-name="P1"><text:span text:style-name="T2">mac-origen: MAC_RTRprimer</text:span></text:p>
      <text:p text:style-name="P1"><text:span text:style-name="T2">mac-destino: MAC_RTRsegundo</text:span></text:p>
      <text:p text:style-name="P1"><text:span text:style-name="T2">ip-origen: IP_RTRprimer</text:span></text:p>
      <text:p text:style-name="P1"><text:span text:style-name="T2">ip-destino: IP_RTRsegundo</text:span></text:p>
      <text:p text:style-name="P1"><text:span text:style-name="T2"/></text:p>
      <text:p text:style-name="P1"><text:span text:style-name="T2">7)</text:span></text:p>
      <text:p text:style-name="P3"><text:span text:style-name="T2"/></text:p>
      <text:p text:style-name="P4"><text:span text:style-name="T2">8) Responder V o F y justificar en ambos casos</text:span></text:p>
      <text:p text:style-name="P4"><text:span text:style-name="T2">A) A menos que PC-A le dirija tráfico a PC-B, PC-B no podrá ver tráfico de ningún protocolo que provenga de PC-A. </text:span><text:span text:style-name="T4">F, veria el trafico de broadcast</text:span></text:p>
      <text:p text:style-name="P4"><text:span text:style-name="T2">B) Durante una comunicación TCP, una vez que una parte finaliza la comunicación con FIN, no pueden enviarse más datos en ningún sentido. </text:span><text:span text:style-name="T4">F, el servidor podria seguir enviando datos al cliente.</text:span></text:p>
      <text:p text:style-name="P4"><text:span text:style-name="T2">C) El protocolo 802.11 utilizado para WIFI utiliza siempre 4 direcciones MAC. </text:span><text:span text:style-name="T4">F, utiliza 4 si es de access point a access point.</text:span></text:p>
      <text:p text:style-name="P4"><text:span text:style-name="T2">D) “::” es una dirección IPv6 válida, utilizada para referenciar a la dirección de loopback </text:span><text:span text:style-name="T4">V, :: es lo mismo que 00:00:00:00:00:00:00:00 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2:38:32.490000000</meta:creation-date>
    <dc:date>2024-02-07T16:25:09.612000000</dc:date>
    <meta:editing-duration>PT3H46M3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6" meta:word-count="378" meta:character-count="2531" meta:non-whitespace-character-count="2169"/>
  </office:meta>
</office:document-meta>
</file>