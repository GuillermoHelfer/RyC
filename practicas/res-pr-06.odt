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2eb7" officeooo:paragraph-rsid="000e2eb7"/>
    </style:style>
    <style:style style:name="P2" style:family="paragraph" style:parent-style-name="Standard">
      <style:text-properties officeooo:paragraph-rsid="000e2eb7"/>
    </style:style>
    <style:style style:name="P3" style:family="paragraph" style:parent-style-name="Standard">
      <style:text-properties officeooo:rsid="000e2eb7" officeooo:paragraph-rsid="000e2eb7"/>
    </style:style>
    <style:style style:name="P4" style:family="paragraph" style:parent-style-name="Standard">
      <style:text-properties style:font-name="Liberation Serif" officeooo:rsid="0011e6e0" officeooo:paragraph-rsid="0011e6e0"/>
    </style:style>
    <style:style style:name="P5" style:family="paragraph" style:parent-style-name="Text_20_body" style:list-style-name="L1">
      <style:paragraph-properties fo:padding="0.0193in" fo:border="0.06pt solid #d9d9e3"/>
    </style:style>
    <style:style style:name="P6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T1" style:family="text">
      <style:text-properties officeooo:rsid="000e2eb7"/>
    </style:style>
    <style:style style:name="T2" style:family="text">
      <style:text-properties loext:padding="0.0193in" loext:border="0.06pt solid #d9d9e3"/>
    </style:style>
    <style:style style:name="T3" style:family="text">
      <style:text-properties officeooo:rsid="00102a81" loext:padding="0.0193in" loext:border="0.06pt solid #d9d9e3"/>
    </style:style>
    <style:style style:name="T4" style:family="text">
      <style:text-properties officeooo:rsid="0011e6e0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d1d5db" loext:opacity="100%" style:font-name="Lato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Lato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efault ports:</text:p>
      <text:p text:style-name="P1"><text:tab/>Web → 80</text:p>
      <text:p text:style-name="P1"><text:tab/>SSH → 22</text:p>
      <text:p text:style-name="P1"><text:tab/>DNS → 53</text:p>
      <text:p text:style-name="P1"><text:tab/>Web Secure → 443</text:p>
      <text:p text:style-name="P1"><text:tab/>POP3 → 110</text:p>
      <text:p text:style-name="P1"><text:tab/>IMAP →143</text:p>
      <text:p text:style-name="P1"><text:tab/>SMTP → 25</text:p>
      <text:p text:style-name="P1"/>
      <text:p text:style-name="P1">en linux, se puede encontrar cada uno de los puertos en /etc/services</text:p>
      <text:p text:style-name="P1"/>
      <text:p text:style-name="P1">2) multicast es una tecnica de comunicacion que permite enviar informacion a diferentes hosts simultaneamente, se aplica en UDP, no puede aplicarse en tcp porque rompe con la logica point-to-point de tcp y esperar la confirmacion para la seguridad de la informacion demoraria mucho tiempo.</text:p>
      <text:p text:style-name="P1"/>
      <text:p text:style-name="P2"><text:span text:style-name="T1">3) </text:span>FTP es un protocolo estándar de la capa de aplicación utilizado para transferir archivos entre sistemas en una red. En su funcionamiento básico, FTP utiliza dos canales de comunicación: un canal de control y un canal de datos.</text:p>
      <text:list xml:id="list3278769538" text:style-name="L1">
        <text:list-header>
          <text:p text:style-name="P5"><text:span text:style-name="Strong_20_Emphasis"><text:span text:style-name="T3">a. </text:span></text:span><text:span text:style-name="Strong_20_Emphasis"><text:span text:style-name="T2">Modo Activo:</text:span></text:span></text:p>
          <text:list>
            <text:list-item>
              <text:p text:style-name="P6">En el modo activo, el cliente FTP inicia una conexión al puerto de control del servidor (puerto 21) y solicita una conexión de datos en un puerto de datos específico (puerto &gt; 1023). El servidor establece entonces una conexión de datos desde su puerto de datos al puerto especificado por el cliente.</text:p>
            </text:list-item>
            <text:list-item>
              <text:p text:style-name="P6">Este modo puede enfrentar problemas con cortafuegos, ya que el servidor está intentando conectar al cliente desde un puerto efímero.</text:p>
            </text:list-item>
          </text:list>
          <text:p text:style-name="P5"><text:span text:style-name="Strong_20_Emphasis"><text:span text:style-name="T3">b. </text:span></text:span><text:span text:style-name="Strong_20_Emphasis"><text:span text:style-name="T2">Modo Pasivo:</text:span></text:span></text:p>
          <text:list text:continue-numbering="true">
            <text:list-item>
              <text:p text:style-name="P6">En el modo pasivo, el servidor FTP abre un puerto de datos y notifica al cliente sobre el número de puerto abierto. El cliente luego inicia una conexión de datos al puerto del servidor.</text:p>
            </text:list-item>
            <text:list-item>
              <text:p text:style-name="P5">El modo pasivo es más compatible con cortafuegos, ya que el cliente está iniciando la conexión de datos.</text:p>
            </text:list-item>
          </text:list>
        </text:list-header>
      </text:list>
      <text:p text:style-name="P1"/>
      <text:p text:style-name="P1">4) <text:span text:style-name="T4">1, 1, 1, 1, 1.</text:span></text:p>
      <text:p text:style-name="P1"/>
      <text:p text:style-name="P4">5) E<text:span text:style-name="T9">l tamaño de la ventana del receptor determina cuántos paquetes puede recibir y almacenar antes de enviar confirmaciones, mientras que el tamaño de la ventana del emisor indica cuántos paquetes puede enviar antes de esperar confirmaciones.</text:span></text:p>
      <text:p text:style-name="P4"><text:span text:style-name="T9"/></text:p>
      <text:p text:style-name="P4"><text:span text:style-name="T9">6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5:42:13.447440691</meta:creation-date>
    <dc:date>2023-12-02T10:41:47.417793007</dc:date>
    <meta:editing-duration>PT23H50M20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0" meta:word-count="298" meta:character-count="1695" meta:non-whitespace-character-count="1413"/>
  </office:meta>
</office:document-meta>
</file>