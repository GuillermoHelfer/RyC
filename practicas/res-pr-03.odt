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06006" style:font-weight-asian="bold" style:font-weight-complex="bold"/>
    </style:style>
    <style:style style:name="P3" style:family="paragraph" style:parent-style-name="Standard">
      <style:text-properties fo:font-weight="bold" officeooo:paragraph-rsid="002c3d6a" style:font-weight-asian="bold" style:font-weight-complex="bold"/>
    </style:style>
    <style:style style:name="P4" style:family="paragraph" style:parent-style-name="Standard">
      <style:text-properties fo:font-weight="bold" officeooo:rsid="00315e0c" officeooo:paragraph-rsid="00315e0c"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228579" officeooo:paragraph-rsid="00228579" style:font-weight-asian="normal" style:font-weight-complex="normal"/>
    </style:style>
    <style:style style:name="P7" style:family="paragraph" style:parent-style-name="Text_20_body">
      <style:text-properties fo:font-weight="normal" officeooo:rsid="00228579" officeooo:paragraph-rsid="00228579" style:font-weight-asian="normal" style:font-weight-complex="normal"/>
    </style:style>
    <style:style style:name="P8" style:family="paragraph" style:parent-style-name="Standard">
      <style:text-properties fo:font-weight="normal" officeooo:paragraph-rsid="00247200" style:font-weight-asian="normal" style:font-weight-complex="normal"/>
    </style:style>
    <style:style style:name="P9" style:family="paragraph" style:parent-style-name="Standard">
      <style:text-properties fo:font-weight="normal" officeooo:rsid="00273784" officeooo:paragraph-rsid="00273784" style:font-weight-asian="normal" style:font-weight-complex="normal"/>
    </style:style>
    <style:style style:name="P10" style:family="paragraph" style:parent-style-name="Standard">
      <style:text-properties fo:font-weight="normal" officeooo:rsid="0027fa1c" officeooo:paragraph-rsid="0027fa1c" style:font-weight-asian="normal" style:font-weight-complex="normal"/>
    </style:style>
    <style:style style:name="P11" style:family="paragraph" style:parent-style-name="Standard">
      <style:text-properties fo:font-weight="normal" officeooo:paragraph-rsid="0029671a" style:font-weight-asian="normal" style:font-weight-complex="normal"/>
    </style:style>
    <style:style style:name="P12" style:family="paragraph" style:parent-style-name="Standard">
      <style:text-properties fo:font-weight="normal" officeooo:rsid="0029671a" officeooo:paragraph-rsid="0029671a" style:font-weight-asian="normal" style:font-weight-complex="normal"/>
    </style:style>
    <style:style style:name="P13" style:family="paragraph" style:parent-style-name="Standard">
      <style:text-properties fo:font-weight="normal" officeooo:rsid="002a4f51" officeooo:paragraph-rsid="002b1356" style:font-weight-asian="normal" style:font-weight-complex="normal"/>
    </style:style>
    <style:style style:name="P14" style:family="paragraph" style:parent-style-name="Standard">
      <style:text-properties fo:font-weight="normal" officeooo:rsid="002b1356" officeooo:paragraph-rsid="002b1356" style:font-weight-asian="normal" style:font-weight-complex="normal"/>
    </style:style>
    <style:style style:name="P15" style:family="paragraph" style:parent-style-name="Standard">
      <style:text-properties fo:font-weight="normal" officeooo:rsid="002c3a34" officeooo:paragraph-rsid="002c3a34" style:font-weight-asian="normal" style:font-weight-complex="normal"/>
    </style:style>
    <style:style style:name="P16" style:family="paragraph" style:parent-style-name="Standard">
      <style:text-properties fo:font-weight="normal" officeooo:rsid="002c3a34" officeooo:paragraph-rsid="002c3d6a" style:font-weight-asian="normal" style:font-weight-complex="normal"/>
    </style:style>
    <style:style style:name="P17" style:family="paragraph" style:parent-style-name="Standard">
      <style:text-properties fo:font-weight="normal" officeooo:rsid="002ce712" officeooo:paragraph-rsid="002ce712" style:font-weight-asian="normal" style:font-weight-complex="normal"/>
    </style:style>
    <style:style style:name="P18" style:family="paragraph" style:parent-style-name="Standard">
      <style:text-properties fo:font-weight="normal" officeooo:paragraph-rsid="002ce712" style:font-weight-asian="normal" style:font-weight-complex="normal"/>
    </style:style>
    <style:style style:name="P19" style:family="paragraph" style:parent-style-name="Standard">
      <style:text-properties fo:font-weight="normal" officeooo:rsid="002e528f" officeooo:paragraph-rsid="002e528f" style:font-weight-asian="normal" style:font-weight-complex="normal"/>
    </style:style>
    <style:style style:name="P20" style:family="paragraph" style:parent-style-name="Standard">
      <style:text-properties fo:font-weight="normal" officeooo:paragraph-rsid="002e528f" style:font-weight-asian="normal" style:font-weight-complex="normal"/>
    </style:style>
    <style:style style:name="P21" style:family="paragraph" style:parent-style-name="Standard">
      <style:text-properties fo:font-weight="normal" officeooo:rsid="00305104" officeooo:paragraph-rsid="00305104" style:font-weight-asian="normal" style:font-weight-complex="normal"/>
    </style:style>
    <style:style style:name="P22" style:family="paragraph" style:parent-style-name="Standard">
      <style:text-properties fo:font-weight="normal" officeooo:rsid="002591d9" officeooo:paragraph-rsid="002591d9" style:font-weight-asian="normal" style:font-weight-complex="normal"/>
    </style:style>
    <style:style style:name="P23" style:family="paragraph" style:parent-style-name="Standard">
      <style:text-properties fo:font-weight="normal" officeooo:rsid="0032ab50" officeooo:paragraph-rsid="0032ab50" style:font-weight-asian="normal" style:font-weight-complex="normal"/>
    </style:style>
    <style:style style:name="P24" style:family="paragraph" style:parent-style-name="Standard">
      <style:text-properties officeooo:paragraph-rsid="00206006"/>
    </style:style>
    <style:style style:name="P25" style:family="paragraph" style:parent-style-name="Standard">
      <style:text-properties officeooo:paragraph-rsid="0027fa1c"/>
    </style:style>
    <style:style style:name="P26" style:family="paragraph" style:parent-style-name="Standard">
      <style:text-properties officeooo:paragraph-rsid="0029671a"/>
    </style:style>
    <style:style style:name="P27" style:family="paragraph" style:parent-style-name="Standard">
      <style:text-properties officeooo:paragraph-rsid="002a4f51"/>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335e95"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Text_20_body" style:list-style-name="L1"/>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2">
      <style:text-properties officeooo:paragraph-rsid="002e528f"/>
    </style:style>
    <style:style style:name="T1" style:family="text">
      <style:text-properties officeooo:rsid="00206006"/>
    </style:style>
    <style:style style:name="T2" style:family="text">
      <style:text-properties officeooo:rsid="00223502"/>
    </style:style>
    <style:style style:name="T3" style:family="text">
      <style:text-properties fo:font-weight="normal" style:font-weight-asian="normal" style:font-weight-complex="normal"/>
    </style:style>
    <style:style style:name="T4" style:family="text">
      <style:text-properties fo:font-weight="normal" officeooo:rsid="0027fa1c" style:font-weight-asian="normal" style:font-weight-complex="normal"/>
    </style:style>
    <style:style style:name="T5" style:family="text">
      <style:text-properties fo:font-weight="normal" officeooo:rsid="0029671a" style:font-weight-asian="normal" style:font-weight-complex="normal"/>
    </style:style>
    <style:style style:name="T6" style:family="text">
      <style:text-properties fo:font-weight="normal" officeooo:rsid="002a4db0" style:font-weight-asian="normal" style:font-weight-complex="normal"/>
    </style:style>
    <style:style style:name="T7" style:family="text">
      <style:text-properties fo:font-weight="normal" officeooo:rsid="002a4f51" style:font-weight-asian="normal" style:font-weight-complex="normal"/>
    </style:style>
    <style:style style:name="T8" style:family="text">
      <style:text-properties officeooo:rsid="002650ef"/>
    </style:style>
    <style:style style:name="T9" style:family="text">
      <style:text-properties officeooo:rsid="0029671a"/>
    </style:style>
    <style:style style:name="T10" style:family="text">
      <style:text-properties officeooo:rsid="002b1356"/>
    </style:style>
    <style:style style:name="T11" style:family="text">
      <style:text-properties officeooo:rsid="002e528f"/>
    </style:style>
    <style:style style:name="T12" style:family="text">
      <style:text-properties officeooo:rsid="00315710"/>
    </style:style>
    <style:style style:name="T13" style:family="text">
      <style:text-properties style:text-underline-style="none"/>
    </style:style>
    <style:style style:name="T14" style:family="text">
      <style:text-properties officeooo:rsid="00335e95"/>
    </style:style>
    <style:style style:name="T15" style:family="text">
      <style:text-properties officeooo:rsid="0034d53f"/>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a de Aplicación - DNS</text:p>
      <text:p text:style-name="P1">Redes y comunicaciones - 2023</text:p>
      <text:p text:style-name="P1">Práctica 3</text:p>
      <text:p text:style-name="P1">Capa de Aplicación - DNS</text:p>
      <text:p text:style-name="P1">DNS</text:p>
      <text:p text:style-name="P1">1. Investigue y describa cómo funciona el DNS. ¿Cuál es su objetivo?</text:p>
      <text:p text:style-name="P5"><text:s text:c="4"/>Solicitud: Cuando escribes una dirección web en tu navegador, como "www.ejemplo.com", tu computadora necesita saber la dirección IP asociada a ese nombre de dominio para llegar al servidor web de ese sitio.</text:p>
      <text:p text:style-name="P5"/>
      <text:p text:style-name="P5"><text:s text:c="4"/>Consulta al servidor DNS local: Tu computadora primero verifica su caché local para ver si ya tiene la dirección IP en memoria. Si no la encuentra, se comunica con un servidor DNS local, que generalmente es proporcionado por tu proveedor de servicios de Internet (ISP).</text:p>
      <text:p text:style-name="P5"/>
      <text:p text:style-name="P5"><text:s text:c="4"/>Búsqueda en caché y resolución: Si el servidor DNS local no tiene la información en su caché, se comunica con otros servidores DNS de nivel superior. Estos servidores consultan una jerarquía de servidores DNS hasta encontrar la IP correspondiente al nombre de dominio. Una vez que encuentran la IP, la envían de regreso a tu computadora y la almacenan en su caché local para futuras consultas.</text:p>
      <text:p text:style-name="P5"/>
      <text:p text:style-name="P5"><text:s text:c="4"/>Comunicación con el servidor web: Con la dirección IP en mano, tu computadora puede comunicarse con el servidor web de "www.ejemplo.com" y solicitar la página web que deseas ver.</text:p>
      <text:p text:style-name="P5"/>
      <text:p text:style-name="P5">En resumen, el DNS facilita la navegación en Internet al traducir nombres de dominio en direcciones IP, lo que permite que las computadoras encuentren y se conecten a los servidores web de los sitios que deseas visitar. Es una parte fundamental de cómo funciona la web.</text:p>
      <text:p text:style-name="P5"/>
      <text:p text:style-name="P1">2. ¿Qué es un root server? ¿Qué es un generic top-level domain (gtld)?</text:p>
      <text:p text:style-name="P5">Hay un conjunto de servidores raíz distribuidos por todo el mundo. Su función principal es responder a las consultas DNS de alto nivel y dirigir las solicitudes hacia los servidores DNS de nivel superior correspondientes. En otras palabras, los servidores raíz ayudan a encontrar información sobre los nombres de dominio cuando no se encuentra en la caché de otros servidores DNS. Son la primera parada en la resolución de nombres de dominio.</text:p>
      <text:p text:style-name="P5"/>
      <text:p text:style-name="P5">Por otro lado, un Generic Top-Level Domain (gTLD) o Dominio de Nivel Superior Genérico es una parte de la jerarquía de nombres de dominio en Internet. Los gTLD son las extensiones de dominio que se encuentran a la derecha del último punto en una dirección web. Algunos ejemplos comunes de gTLD incluyen ".com," ".org," ".net," ".info," y ".gov." Estas extensiones son utilizadas para clasificar y organizar los nombres de dominio en categorías más amplias y genéricas.</text:p>
      <text:p text:style-name="P5"/>
      <text:p text:style-name="P1">3. ¿Qué es una respuesta del tipo autoritativa?</text:p>
      <text:p text:style-name="P5">Esto significa que el servidor DNS que responde a tu consulta es el servidor DNS principal o de autoridad para el dominio en cuestión. Tiene la información más actualizada y precisa sobre ese nombre de dominio y puede proporcionar una respuesta definitiva y confiable.</text:p>
      <text:p text:style-name="P5"/>
      <text:p text:style-name="P1">4. ¿Qué diferencia una consulta DNS recursiva de una iterativa?</text:p>
      <text:p text:style-name="P5"><text:span text:style-name="T1">L</text:span>a diferencia clave entre una consulta DNS recursiva y una iterativa es cómo se maneja la búsqueda de información. En la consulta recursiva, el servidor DNS hace todo el trabajo y proporciona una respuesta completa, mientras que en la consulta iterativa, el cliente recibe referencias y realiza búsquedas adicionales de manera incremental hasta obtener la respuesta completa.</text:p>
      <text:p text:style-name="P1"><text:soft-page-break/>5. ¿Qué es el resolver?</text:p>
      <text:p text:style-name="P4"><text:tab/><text:span text:style-name="T3">El resolver es un servidor que resuelve dominios en direcciones ip para el cliente de manera <text:tab/>recursiva.</text:span></text:p>
      <text:p text:style-name="P1">6. Describa para qué se utilizan los siguientes tipos de registros de DNS:</text:p>
      <text:p text:style-name="P1">a. A </text:p>
      <text:p text:style-name="P1">b. MX </text:p>
      <text:p text:style-name="P1">c. PTR </text:p>
      <text:p text:style-name="P1">d. AAAA </text:p>
      <text:p text:style-name="P1">e. SRV</text:p>
      <text:p text:style-name="P2">f. NS</text:p>
      <text:p text:style-name="P2">g. CNAME</text:p>
      <text:p text:style-name="P2">h. SOA</text:p>
      <text:p text:style-name="P2">i. TXT</text:p>
      <text:p text:style-name="P24">–</text:p>
      <text:p text:style-name="P24">a. Registro A (Address Record): Este tipo de registro se utiliza para mapear un nombre de dominio (por ejemplo, www.ejemplo.com) a una dirección IP IPv4 específica. Esencialmente, permite que los navegadores y otros servicios en línea encuentren el servidor al que deben conectarse para acceder a un sitio web.</text:p>
      <text:p text:style-name="P24"/>
      <text:p text:style-name="P24">b. Registro MX (Mail Exchange Record): Los registros MX se utilizan para especificar los servidores de correo electrónico que deben recibir correos electrónicos destinados a un dominio específico. Ayudan a dirigir el tráfico de correo a los servidores de correo adecuados.</text:p>
      <text:p text:style-name="P24"/>
      <text:p text:style-name="P24">c. Registro PTR (Pointer Record): Los registros PTR se utilizan para realizar la resolución inversa de direcciones IP a nombres de dominio. Son útiles en la identificación de nombres de host a partir de direcciones IP, lo que es especialmente útil en la gestión de servidores y diagnóstico de problemas de red.</text:p>
      <text:p text:style-name="P24"/>
      <text:p text:style-name="P24">d. Registro AAAA: Similar al registro A, pero se utiliza para mapear un nombre de dominio a una dirección IPv6 en lugar de IPv4. IPv6 se utiliza para manejar el crecimiento de dispositivos en Internet y proporciona un espacio de direcciones más grande.</text:p>
      <text:p text:style-name="P24"/>
      <text:p text:style-name="P24">e. Registro SRV (Service Record): Estos registros se utilizan para describir la ubicación de servicios específicos dentro de un dominio. Por ejemplo, se utilizan para ayudar a los clientes de correo electrónico a encontrar servidores de correo, o para dirigir las solicitudes de mensajería instantánea a servidores específicos.</text:p>
      <text:p text:style-name="P24"/>
      <text:p text:style-name="P24">f. Registro NS (Name Server): Los registros NS especifican los servidores de nombres de dominio autoritativos para un dominio. Ayudan a determinar qué servidores son responsables de gestionar las consultas DNS para ese dominio.</text:p>
      <text:p text:style-name="P24"/>
      <text:p text:style-name="P24">g. Registro CNAME (Canonical Name): Los registros CNAME se utilizan para crear alias de nombres de dominio. Permiten que un nombre de dominio se traduzca a otro nombre de dominio. Esto es útil para simplificar la administración y redirección de nombres de host.</text:p>
      <text:p text:style-name="P24"/>
      <text:p text:style-name="P24">h. Registro SOA (Start of Authority): Este registro se utiliza para identificar el servidor DNS primario (master) para un dominio. Contiene información importante sobre la zona, como el administrador de la zona, el intervalo de actualización y otros parámetros.</text:p>
      <text:p text:style-name="P24"/>
      <text:p text:style-name="P24"><text:soft-page-break/>i. Registro TXT (Text Record): Los registros TXT se utilizan para almacenar información de texto arbitraria asociada con un nombre de dominio. Se utilizan para diversas finalidades, como la autenticación de correo electrónico (SPF), verificación de propiedad de dominio y más.</text:p>
      <text:p text:style-name="P24"/>
      <text:p text:style-name="P1">7. En Internet, un dominio suele tener más de un servidor DNS. ¿Por qué cree que esto es así?</text:p>
      <text:p text:style-name="P5"><text:span text:style-name="T2">T</text:span>ener múltiples servidores DNS para un dominio es una práctica recomendada para garantizar la disponibilidad, el rendimiento y la seguridad del servicio de resolución de nombres de dominio en Internet. Cada servidor DNS puede estar configurado para respaldar y complementar a los demás, lo que mejora la robustez de la infraestructura DNS.</text:p>
      <text:p text:style-name="P5"/>
      <text:p text:style-name="P1">8. Cuando un dominio cuenta con más de un servidor, uno de ellos es el primario (o maestro) y todos los demás son los secundarios (o esclavos). ¿Cuál es la razón de que sea así?</text:p>
      <text:p text:style-name="P6">La razón principal para tener esta estructura es la distribución de la carga de trabajo y la redundancia en la gestión de registros de zona DNS.</text:p>
      <text:p text:style-name="P6"/>
      <text:p text:style-name="P1">9. Explique brevemente en qué consiste el mecanismo de transferencia de zona y cuál es su finalidad.</text:p>
      <text:p text:style-name="P7">El mecanismo de transferencia de zona es un proceso mediante el cual se copian los datos de una zona DNS completa, incluyendo todos sus registros, desde un servidor DNS primario (maestro) a uno o varios servidores DNS secundarios (esclavos). Su finalidad principal es mantener la consistencia y la actualización de la información de la zona en todos los servidores autoritativos de esa zona.</text:p>
      <text:p text:style-name="P1">10. Imagine que usted es el administrador del dominio de DNS de la UNLP (unlp.edu.ar). A su vez, cada facultad de la UNLP cuenta con un administrador que gestiona su propio dominio (por ejemplo, en el caso de la Facultad de Informática se trata de info.unlp.edu.ar). Suponga que se crea una nueva facultad, Facultad de Redes, cuyo dominio será redes.unlp.edu.ar, y el administrador le indica que quiere poder manejar su propio dominio. ¿Qué debe hacer usted para que el administrador de la Facultad de Redes pueda gestionar el dominio de forma independiente? (Pista: investigue en qué consiste la delegación de dominios).</text:p>
      <text:p text:style-name="P8">Para delegar la autoridad de un subdominio, como "redes.unlp.edu.ar", creas registros NS en la zona del dominio principal (unlp.edu.ar). Estos registros NS apuntan a los servidores DNS que serán responsables de administrar el subdominio "redes.unlp.edu.ar". Por lo tanto, estás "delegando" la responsabilidad de ese subdominio a otros servidores DNS.</text:p>
      <text:p text:style-name="P1">11. Responda y justifique los siguientes ejercicios.</text:p>
      <text:p text:style-name="P1">a. En la VM, utilice el comando dig para obtener la dirección IP del host www.redes.unlp.edu.ar y</text:p>
      <text:p text:style-name="P1">responda:</text:p>
      <text:p text:style-name="P1">b. ¿Cuáles son los servidores de DNS del dominio redes.unlp.edu.ar?</text:p>
      <text:p text:style-name="P9">ns-sv-b.redes.unlp.edu.ar</text:p>
      <text:p text:style-name="P1">c. Repita la consulta anterior cuatro veces más. ¿Qué observa? ¿Puede explicar a qué se debe?</text:p>
      <text:p text:style-name="P22">Cambia la COOKIE. <text:span text:style-name="T8">L</text:span>a variación de la cookie en consultas DNS es parte de las medidas de seguridad y privacidad implementadas en el protocolo DNSSEC y en la configuración de algunos servidores DNS. Estas cookies ayudan a proteger las comunicaciones DNS y a prevenir la manipulación maliciosa de las respuestas DNS.</text:p>
      <text:p text:style-name="P22"/>
      <text:p text:style-name="P23">Creo que en realidad lo que cambia es el ttl de la cache...</text:p>
      <text:p text:style-name="P1">d. Observe la información que obtuvo al consultar por los servidores de DNS del dominio. En base a la salida, ¿es posible indicar cuál de ellos es el primario?</text:p>
      <text:p text:style-name="P10"><text:span text:style-name="Source_20_Text">No.</text:span></text:p>
      <text:p text:style-name="P1">e. Consulte por el registro SOA del dominio y responda.</text:p>
      <text:p text:style-name="P1"><text:soft-page-break/>i. ¿Puede ahora determinar cuál es el servidor de DNS primario?</text:p>
      <text:p text:style-name="P25"><text:span text:style-name="T4">Si. </text:span><text:span text:style-name="Source_20_Text">ns-sv-b.redes.unlp.edu.ar</text:span></text:p>
      <text:p text:style-name="P1">ii. ¿Cuál es el número de serie, qué convención sigue y en qué casos es importante actualizarlo?</text:p>
      <text:p text:style-name="P11">2020031700, <text:span text:style-name="T9">AAAAMMDDNN, es importante actualizarlo para controlar las actualizaciones y actualizar los servidores dns secundarios.</text:span></text:p>
      <text:p text:style-name="P1">iii. ¿Qué valor tiene el segundo campo del registro? Investigue para qué se usa y como se inter-</text:p>
      <text:p text:style-name="P1">preta el valor.</text:p>
      <text:p text:style-name="P12">86400. Este valor significa que los servidores DNS secundarios intentaran obtener una copia actualizada de la zona DNS cada 24hs (86<text:span text:style-name="T12">4</text:span>00 segundos).</text:p>
      <text:p text:style-name="P1">iv. ¿Qué valor tiene el TTL de caché negativa y qué significa?<text:span text:style-name="T13"/></text:p>
      <text:p text:style-name="P26"><text:span text:style-name="T5">300. </text:span>el TTL de caché negativa controla cuánto tiempo se mantiene en caché la información de error o de "no existe" en un servidor DNS, evitando consultas excesivas a los servidores autoritativos y mejorando la eficiencia del sistema de resolución de nombres.</text:p>
      <text:p text:style-name="P1">f. Indique qué valor tiene el registro TXT para el nombre saludo.redes.unlp.edu.ar. Investigue para qué es usado este registro.</text:p>
      <text:p text:style-name="Standard"><text:span text:style-name="T3">“</text:span><text:span text:style-name="T6">HOLA”. E</text:span>l registro TXT es versátil y se usa principalmente para almacenar información legible por humanos relacionada con la gestión y la autenticación de dominios, la seguridad de correo electrónico y otras aplicaciones. Los administradores de dominio pueden agregar registros TXT según sea necesario para cumplir con los requisitos específicos de los servicios o protocolos que utilizan.</text:p>
      <text:p text:style-name="P1">g. Utilizando dig, solicite la transferencia de zona de redes.unlp.edu.ar, analice la salida y responda.</text:p>
      <text:p text:style-name="P1">i. ¿Qué significan los números que aparecen antes de la palabra IN? ¿Cuál es su finalidad?</text:p>
      <text:p text:style-name="P27"><text:span text:style-name="T7">Es el TTL. R</text:span>epresentan el tiempo de vida (TTL) o "Time to Live" de un registro DNS. El TTL es un valor numérico expresado en segundos que indica cuánto tiempo un registro DNS puede permanecer en caché en los servidores DNS recursivos y en otros sistemas antes de que deba ser descartado y refrescado desde el servidor DNS autoritativo.</text:p>
      <text:p text:style-name="P1">ii. ¿Cuántos registros NS observa? Compare la respuesta con los servidores de DNS del dominio</text:p>
      <text:p text:style-name="P1">redes.unlp.edu.ar que dio anteriormente. ¿Puede explicar a qué se debe la diferencia y qué</text:p>
      <text:p text:style-name="P1">significa?</text:p>
      <text:p text:style-name="P27"><text:span text:style-name="T7">4. </text:span>Al solicitar una transferencia de zona, obtienes una lista más completa de servidores NS, ya que esta operación implica obtener toda la información de la zona DNS, incluyendo todos los registros y los servidores NS autoritativos para ese dominio en particular. Esto significa que verás todos los servidores NS configurados para la gestión de la zona, que pueden incluir servidores secundarios y otros servidores relacionados con la infraestructura de DNS de ese dominio.</text:p>
      <text:p text:style-name="P1">h. Consulte por el registro A de www.redes.unlp.edu.ar y luego por el registro A de www.practica.redes.unlp.edu.ar. Observe los TTL de ambos. Repita la operación y compare el valor de los TTL de cada uno respecto de la respuesta anterior. ¿Puede explicar qué está ocurriendo? (Pista: observar los flags será de ayuda).</text:p>
      <text:p text:style-name="P13">300, <text:span text:style-name="T10">60.</text:span></text:p>
      <text:p text:style-name="P14">300, 18. </text:p>
      <text:p text:style-name="P14">La diferencia esta en que en el dominio de practica, la respuesta no es autoritativa.</text:p>
      <text:p text:style-name="P1">i. Consulte por el registro A de www.practica2.redes.unlp.edu.ar. ¿Obtuvo alguna respuesta? Investigue sobre los codigos de respuesta de DNS. ¿Para qué son utilizados los mensajes NXDOMAIN y NOERROR?</text:p>
      <text:list text:style-name="L1">
        <text:list-item>
          <text:p text:style-name="P32"><text:span text:style-name="Strong_20_Emphasis">NXDOMAIN</text:span> se utiliza cuando el dominio buscado no existe en la base de datos del servidor DNS autoritativo y, por lo tanto, no hay registros disponibles para ese dominio.</text:p>
        </text:list-item>
        <text:list-item>
          <text:p text:style-name="P31"><text:soft-page-break/><text:span text:style-name="Strong_20_Emphasis">NOERROR</text:span> se utiliza cuando la consulta DNS se procesa sin errores y se encuentran registros asociados con el nombre de dominio consultado. Esta respuesta no indica si la consulta resultó en registros válidos o no, simplemente que no hubo errores en el proceso de consulta.</text:p>
        </text:list-item>
      </text:list>
      <text:p text:style-name="P1">12. Investigue los comando nslookup y host. ¿Para qué sirven? Intente con ambos comandos obtener:</text:p>
      <text:p text:style-name="P1">Dirección IP de www.redes.unlp.edu.ar.</text:p>
      <text:p text:style-name="P1">Servidores de correo del dominio redes.unlp.edu.ar.</text:p>
      <text:p text:style-name="P1">Servidores de DNS del dominio redes.unlp.edu.ar.</text:p>
      <text:p text:style-name="P5">En resumen, tanto <text:span text:style-name="Source_20_Text">nslookup</text:span> como <text:span text:style-name="Source_20_Text">host</text:span> son herramientas de línea de comandos que te permiten realizar consultas DNS y obtener información sobre nombres de dominio y direcciones IP.</text:p>
      <text:p text:style-name="P15">Nslookup es mas especifico y manual. Host es simple, automatizable y legible.</text:p>
      <text:p text:style-name="P15"/>
      <text:p text:style-name="P15">////////////////////////////////////////////////////////////////////////////////////////////</text:p>
      <text:p text:style-name="P15">redes@debian:~$ nslookup www.redes.unlp.edu.ar</text:p>
      <text:p text:style-name="P15">Server:<text:tab/><text:tab/>172.28.0.29</text:p>
      <text:p text:style-name="P15">Address:<text:tab/>172.28.0.29#53</text:p>
      <text:p text:style-name="P15"/>
      <text:p text:style-name="P15">Name:<text:tab/>www.redes.unlp.edu.ar</text:p>
      <text:p text:style-name="P15">Address: 172.28.0.50</text:p>
      <text:p text:style-name="P15"/>
      <text:p text:style-name="P15">redes@debian:~$ host www.redes.unlp.edu.ar</text:p>
      <text:p text:style-name="P15">www.redes.unlp.edu.ar has address 172.28.0.50</text:p>
      <text:p text:style-name="P15">////////////////////////////////////////////////////////////////////////////////////////////</text:p>
      <text:p text:style-name="P15">redes@debian:~$ nslookup -query=MX redes.unlp.edu.ar</text:p>
      <text:p text:style-name="P15">Server:<text:tab/><text:tab/>172.28.0.29</text:p>
      <text:p text:style-name="P15">Address:<text:tab/>172.28.0.29#53</text:p>
      <text:p text:style-name="P15"/>
      <text:p text:style-name="P15">redes.unlp.edu.ar<text:tab/>mail exchanger = 10 mail2.redes.unlp.edu.ar.</text:p>
      <text:p text:style-name="P15">redes.unlp.edu.ar<text:tab/>mail exchanger = 5 mail.redes.unlp.edu.ar.</text:p>
      <text:p text:style-name="P15"/>
      <text:p text:style-name="P15">redes@debian:~$ host -t MX redes.unlp.edu.ar</text:p>
      <text:p text:style-name="P15">redes.unlp.edu.ar mail is handled by 5 mail.redes.unlp.edu.ar.</text:p>
      <text:p text:style-name="P15">redes.unlp.edu.ar mail is handled by 10 mail2.redes.unlp.edu.ar.</text:p>
      <text:p text:style-name="P15">////////////////////////////////////////////////////////////////////////////////////////////</text:p>
      <text:p text:style-name="P15">redes@debian:~$ nslookup -type=NS redes.unlp.edu.ar</text:p>
      <text:p text:style-name="P15">Server:<text:tab/><text:tab/>172.28.0.29</text:p>
      <text:p text:style-name="P15">Address:<text:tab/>172.28.0.29#53</text:p>
      <text:p text:style-name="P15"/>
      <text:p text:style-name="P15">redes.unlp.edu.ar<text:tab/>nameserver = ns-sv-b.redes.unlp.edu.ar.</text:p>
      <text:p text:style-name="P15">redes.unlp.edu.ar<text:tab/>nameserver = ns-sv-a.redes.unlp.edu.ar.</text:p>
      <text:p text:style-name="P15"/>
      <text:p text:style-name="P15">redes@debian:~$ host -t NS redes.unlp.edu.ar</text:p>
      <text:p text:style-name="P15">redes.unlp.edu.ar name server ns-sv-a.redes.unlp.edu.ar.</text:p>
      <text:p text:style-name="P16">redes.unlp.edu.ar name server ns-sv-b.redes.unlp.edu.ar.</text:p>
      <text:p text:style-name="P16">////////////////////////////////////////////////////////////////////////////////////////////</text:p>
      <text:p text:style-name="P15"/>
      <text:p text:style-name="P1">13. ¿Qué función cumple en Linux/Unix el archivo /etc/hosts o en Windows el archivo \WINDOWS\system32\drivers\etc\hosts?</text:p>
      <text:p text:style-name="P5"><text:soft-page-break/>En resumen, el archivo /etc/hosts en sistemas Unix/Linux y el archivo \WINDOWS\system32\drivers\etc\hosts en sistemas Windows son archivos locales que se utilizan para mapear nombres de host a direcciones IP en el nivel del sistema operativo, lo que permite una resolución de nombres personalizada y local.</text:p>
      <text:p text:style-name="P1">14. Abra el programa Wireshark para comenzar a capturar el tráfico de red en la interfaz con IP 172.28.0.1.</text:p>
      <text:p text:style-name="P1">Una vez abierto realice una consulta DNS con el comando dig para averiguar el registro MX de redes.unlp.edu.ar y luego, otra para averiguar los registros NS correspondientes al dominio redes.unlp.edu.ar.</text:p>
      <text:p text:style-name="P1">Analice la información proporcionada por dig y compárelo con la captura.</text:p>
      <text:p text:style-name="P17">Son identicos.</text:p>
      <text:p text:style-name="P1">15. Dada la siguiente situación: “Una PC en una red determinada, con acceso a Internet, utiliza los servicios de DNS de un servidor de la red”. Analice:</text:p>
      <text:p text:style-name="P1">a. ¿Qué tipo de consultas (iterativas o recursivas) realiza la PC a su servidor de DNS?</text:p>
      <text:p text:style-name="P3">b. ¿Qué tipo de consultas (iterativas o recursivas) realiza el servidor de DNS para resolver requerimientos de usuario como el anterior? ¿A quién le realiza estas consultas?</text:p>
      <text:p text:style-name="P17">a. recursiva.</text:p>
      <text:p text:style-name="P17">b. iterativa. Realiza consultas a servidores dns de mayor nivel. </text:p>
      <text:p text:style-name="P17"/>
      <text:p text:style-name="P3">16. Relacione DNS con HTTP. ¿Se puede navegar si no hay servicio de DNS?</text:p>
      <text:p text:style-name="P17">DNS traduce dominios en direcciones IP numericas, HTTP transporta la informacion de la pagina web a la computadora tranformandola en lo que vemos.</text:p>
      <text:p text:style-name="P17">Si se puede navegar sin DNS.</text:p>
      <text:p text:style-name="P18"/>
      <text:p text:style-name="P1">17. Observar el siguiente gráfico y contestar:</text:p>
      <text:p text:style-name="P1">a. Si la PC-A, que usa como servidor de DNS a "DNS Server", desea obtener la IP de www.unlp.edu.ar, cuáles serían, y en qué orden, los pasos que se ejecutarán para obtener la respuesta.</text:p>
      <text:p text:style-name="P17">PC-A – <text:span text:style-name="T11">DNS Server</text:span></text:p>
      <text:p text:style-name="P19">DNS Server – Router A</text:p>
      <text:p text:style-name="P19">DNS Server – A.Root-Server</text:p>
      <text:p text:style-name="P19">DNS Server – Dominio:unlp.edu.ar</text:p>
      <text:p text:style-name="P19">DNS Server – www.unlp.edu.ar</text:p>
      <text:p text:style-name="P1">b. ¿Dónde es recursiva la consulta? ¿Y dónde iterativa?</text:p>
      <text:p text:style-name="P19">Es recursiva de la pc-a al DNS Server. Iterativa desde el DNS Server a www.unlp.edu.ar</text:p>
      <text:p text:style-name="P1"/>
      <text:p text:style-name="P1">18. ¿A quién debería consultar para que la respuesta sobre www.google.com sea autoritativa?</text:p>
      <text:list text:style-name="L2">
        <text:list-item>
          <text:p text:style-name="P33"><text:span text:style-name="Strong_20_Emphasis"><text:span text:style-name="T3">ns1.google.com</text:span></text:span></text:p>
        </text:list-item>
        <text:list-item>
          <text:p text:style-name="P34"><text:span text:style-name="Strong_20_Emphasis"><text:span text:style-name="T3">ns2.google.com</text:span></text:span></text:p>
        </text:list-item>
        <text:list-item>
          <text:p text:style-name="P34"><text:span text:style-name="Strong_20_Emphasis"><text:span text:style-name="T3">ns3.google.com</text:span></text:span></text:p>
        </text:list-item>
        <text:list-item>
          <text:p text:style-name="P35"><text:span text:style-name="Strong_20_Emphasis"><text:span text:style-name="T3">ns4.google.com</text:span></text:span></text:p>
        </text:list-item>
      </text:list>
      <text:p text:style-name="P20">dig @ns1.google.com www.google.com</text:p>
      <text:p text:style-name="P20"/>
      <text:p text:style-name="P1">19. ¿Qué sucede si al servidor elegido en el paso anterior se lo consulta por www.info.unlp.edu.ar? ¿Y si la consulta es al servidor 8.8.8.8?</text:p>
      <text:p text:style-name="P21">En la primera opcion la respuesta es iterativa. En la segunda la respuesta es recursiva.</text:p>
      <text:p text:style-name="P1"/>
      <text:p text:style-name="P1">Ejercicio de parcial</text:p>
      <text:p text:style-name="P1"><text:soft-page-break/>20. En base a la siguiente salida de dig, conteste las consignas. Justifique en todos los casos.</text:p>
      <text:p text:style-name="P1">1</text:p>
      <text:p text:style-name="P1">;; flags: qr rd ra; QUERY: 1, ANSWER: 2, AUTHORITY: 4, ADDITIONAL: 4</text:p>
      <text:p text:style-name="P1">2</text:p>
      <text:p text:style-name="P1">3 ;; QUESTION SECTION:</text:p>
      <text:p text:style-name="P1">4 ;ejemplo.com.</text:p>
      <text:p text:style-name="P1">IN</text:p>
      <text:p text:style-name="P1"/>
      <text:p text:style-name="P29"><text:span text:style-name="T14">EJERCICIO DE PARCIAL:</text:span></text:p>
      <text:p text:style-name="P5">;; flags: qr rd ra; QUERY: 1, ANSWER: 2, AUTHORITY: 4, ADDITIONAL: 4</text:p>
      <text:p text:style-name="P5">;; QUESTION SECTION:</text:p>
      <text:p text:style-name="P5">;ejemplo.com. IN A</text:p>
      <text:p text:style-name="P5">;; ANSWER SECTION:</text:p>
      <text:p text:style-name="P5">ejemplo.com. 1634 IN MX 10 srv01.ejemplo.com. (1)</text:p>
      <text:p text:style-name="P5">ejemplo.com. 1634 IN MX 5 srv00.ejemplo.com. (2)</text:p>
      <text:p text:style-name="P5">;; AUTHORITY SECTION:</text:p>
      <text:p text:style-name="P5">ejemplo.com. 92354 IN NS ss00.ejemplo.com.</text:p>
      <text:p text:style-name="P5">ejemplo.com. 92354 IN NS ss02.ejemplo.com.</text:p>
      <text:p text:style-name="P5">ejemplo.com. 92354 IN NS ss01.ejemplo.com.</text:p>
      <text:p text:style-name="P5">ejemplo.com. 92354 IN NS ss03.ejemplo.com.</text:p>
      <text:p text:style-name="P5">;; ADDITIONAL SECTION:</text:p>
      <text:p text:style-name="P5">srv01.ejemplo.com. 272 IN A 64.233.186.26</text:p>
      <text:p text:style-name="P5">srv01.ejemplo.com. 240 IN AAAA 2800:3f0:4003:c00::1a</text:p>
      <text:p text:style-name="P5">srv00.ejemplo.com. 272 IN A 74.125.133.26</text:p>
      <text:p text:style-name="P5">srv00.ejemplo.com. 240 IN AAAA 2a00:1450:400c:c07::1b</text:p>
      <text:p text:style-name="P5"/>
      <text:p text:style-name="P5">a. Complete las líneas donde aparece __ con el registro correcto.</text:p>
      <text:p text:style-name="P5"/>
      <text:p text:style-name="P5">b .Es una respuesta autoritativa? En caso de no serlo, ¿a qué servidor le preguntaría</text:p>
      <text:p text:style-name="P5">para obtener una respuesta autoritativa?</text:p>
      <text:p text:style-name="P5"><text:tab/>No, habria que averiguar cual es el soa para ese dominio y preguntarle a ese.</text:p>
      <text:p text:style-name="P5"/>
      <text:p text:style-name="P5">c. ¿La consulta fue recursiva? ¿Y la respuesta?</text:p>
      <text:p text:style-name="P5"><text:tab/>rd(Recursion Desired) ra(Recursion Available): <text:span text:style-name="T15">solicita se le responda de manera recursiva</text:span> y <text:tab/><text:tab/><text:span text:style-name="T15">el servidor admite respuestas recursivas.</text:span></text:p>
      <text:p text:style-name="P5"/>
      <text:p text:style-name="P5">d. ¿Qué representan los valores 10 y 5 en las líneas (1) y (2).</text:p>
      <text:p text:style-name="P5"><text:tab/>representan la prioridad que tienen los servidores de correo M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6:05:53.676580570</meta:creation-date>
    <dc:date>2024-09-16T19:23:04.309000000</dc:date>
    <meta:editing-duration>PT19M55S</meta:editing-duration>
    <meta:editing-cycles>7</meta:editing-cycles>
    <meta:generator>LibreOffice/7.6.5.2$Windows_X86_64 LibreOffice_project/38d5f62f85355c192ef5f1dd47c5c0c0c6d6598b</meta:generator>
    <meta:document-statistic meta:table-count="0" meta:image-count="0" meta:object-count="0" meta:page-count="7" meta:paragraph-count="181" meta:word-count="2849" meta:character-count="18536" meta:non-whitespace-character-count="15836"/>
  </office:meta>
</office:document-meta>
</file>