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0pt" officeooo:rsid="0000bcfb" officeooo:paragraph-rsid="0000bcfb" style:font-size-asian="17.5pt" style:font-size-complex="20pt"/>
    </style:style>
    <style:style style:name="P2" style:family="paragraph" style:parent-style-name="Standard">
      <style:text-properties fo:font-size="14pt" officeooo:rsid="0000bcfb" officeooo:paragraph-rsid="0000bcfb" style:font-size-asian="12.25pt" style:font-size-complex="14pt"/>
    </style:style>
    <style:style style:name="P3" style:family="paragraph" style:parent-style-name="Standard">
      <style:text-properties fo:font-size="14pt" officeooo:rsid="00029300" officeooo:paragraph-rsid="00029300" style:font-size-asian="12.25pt" style:font-size-complex="14pt"/>
    </style:style>
    <style:style style:name="P4" style:family="paragraph" style:parent-style-name="Standard">
      <style:text-properties fo:font-size="14pt" officeooo:rsid="0004fa10" officeooo:paragraph-rsid="0004fa10" style:font-size-asian="12.25pt" style:font-size-complex="14pt"/>
    </style:style>
    <style:style style:name="P5" style:family="paragraph" style:parent-style-name="Standard">
      <style:text-properties fo:font-size="14pt" officeooo:rsid="0004fa10" officeooo:paragraph-rsid="00069b9a" style:font-size-asian="12.25pt" style:font-size-complex="14pt"/>
    </style:style>
    <style:style style:name="P6" style:family="paragraph" style:parent-style-name="Standard">
      <style:text-properties fo:font-size="14pt" officeooo:rsid="0008311c" officeooo:paragraph-rsid="0008311c" style:font-size-asian="12.25pt" style:font-size-complex="14pt"/>
    </style:style>
    <style:style style:name="P7" style:family="paragraph" style:parent-style-name="Standard">
      <style:text-properties fo:font-size="14pt" fo:language="es" fo:country="ES" officeooo:rsid="0000bcfb" officeooo:paragraph-rsid="0000bcfb" style:font-size-asian="12.25pt" style:font-size-complex="14pt"/>
    </style:style>
    <style:style style:name="P8" style:family="paragraph" style:parent-style-name="Standard">
      <style:text-properties officeooo:paragraph-rsid="0008311c"/>
    </style:style>
    <style:style style:name="P9" style:family="paragraph" style:parent-style-name="Standard">
      <style:text-properties officeooo:paragraph-rsid="000909cd"/>
    </style:style>
    <style:style style:name="P10" style:family="paragraph" style:parent-style-name="Standard">
      <style:paragraph-properties fo:line-height="100%"/>
      <style:text-properties officeooo:paragraph-rsid="000909cd"/>
    </style:style>
    <style:style style:name="P11" style:family="paragraph" style:parent-style-name="Standard">
      <style:text-properties officeooo:paragraph-rsid="000a1e3b"/>
    </style:style>
    <style:style style:name="P12" style:family="paragraph" style:parent-style-name="Standard">
      <style:text-properties officeooo:paragraph-rsid="000c902d"/>
    </style:style>
    <style:style style:name="P13" style:family="paragraph" style:parent-style-name="Standard">
      <style:text-properties fo:font-size="14pt" fo:font-weight="bold" officeooo:rsid="0000bcfb" officeooo:paragraph-rsid="0000bcfb" style:font-size-asian="12.25pt" style:font-weight-asian="bold" style:font-size-complex="14pt" style:font-weight-complex="bold"/>
    </style:style>
    <style:style style:name="P14" style:family="paragraph" style:parent-style-name="Standard">
      <style:text-properties style:text-position="0% 100%" fo:font-size="14pt" fo:font-weight="normal" officeooo:rsid="00029300" officeooo:paragraph-rsid="00029300" style:font-size-asian="12.25pt" style:font-weight-asian="normal" style:font-size-complex="14pt" style:font-weight-complex="normal"/>
    </style:style>
    <style:style style:name="P15" style:family="paragraph" style:parent-style-name="Standard">
      <style:text-properties style:text-position="0% 100%" fo:font-size="14pt" fo:font-weight="normal" officeooo:rsid="000297ff" officeooo:paragraph-rsid="000297ff" style:font-size-asian="12.25pt" style:font-weight-asian="normal" style:font-size-complex="14pt" style:font-weight-complex="normal"/>
    </style:style>
    <style:style style:name="P16" style:family="paragraph" style:parent-style-name="Standard">
      <style:text-properties style:text-position="0% 100%" fo:font-size="14pt" fo:font-weight="normal" officeooo:rsid="00044943" officeooo:paragraph-rsid="00044943" style:font-size-asian="12.25pt" style:font-weight-asian="normal" style:font-size-complex="14pt" style:font-weight-complex="normal"/>
    </style:style>
    <style:style style:name="P17" style:family="paragraph" style:parent-style-name="Standard">
      <style:text-properties style:text-position="0% 100%" fo:font-size="14pt" fo:font-weight="normal" officeooo:rsid="0004fa10" officeooo:paragraph-rsid="0004fa10" style:font-size-asian="12.25pt" style:font-weight-asian="normal" style:font-size-complex="14pt" style:font-weight-complex="normal"/>
    </style:style>
    <style:style style:name="P18" style:family="paragraph" style:parent-style-name="Standard">
      <style:text-properties style:text-position="0% 100%" fo:font-size="14pt" fo:font-weight="normal" officeooo:rsid="00069b9a" officeooo:paragraph-rsid="00069b9a" style:font-size-asian="12.25pt" style:font-weight-asian="normal" style:font-size-complex="14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0% 100%" fo:font-weight="normal" style:font-weight-asian="normal" style:font-weight-complex="normal"/>
    </style:style>
    <style:style style:name="T4" style:family="text">
      <style:text-properties style:text-position="0% 100%" fo:font-weight="normal" officeooo:rsid="00069b9a" style:font-weight-asian="normal" style:font-weight-complex="normal"/>
    </style:style>
    <style:style style:name="T5" style:family="text">
      <style:text-properties style:text-position="0% 100%" fo:font-weight="normal" officeooo:rsid="000909cd" style:font-weight-asian="normal" style:font-weight-complex="normal"/>
    </style:style>
    <style:style style:name="T6" style:family="text">
      <style:text-properties style:text-position="0% 100%" fo:font-size="14pt" fo:font-weight="normal" officeooo:rsid="0008311c" style:font-size-asian="12.25pt" style:font-weight-asian="normal" style:font-size-complex="14pt" style:font-weight-complex="normal"/>
    </style:style>
    <style:style style:name="T7" style:family="text">
      <style:text-properties style:text-position="0% 100%" fo:font-size="14pt" fo:font-weight="normal" officeooo:rsid="000909cd" style:font-size-asian="12.25pt" style:font-weight-asian="normal" style:font-size-complex="14pt" style:font-weight-complex="normal"/>
    </style:style>
    <style:style style:name="T8" style:family="text">
      <style:text-properties style:text-position="0% 100%" fo:font-size="12pt" fo:font-weight="normal" officeooo:rsid="000909cd" style:font-size-asian="12pt" style:font-weight-asian="normal" style:font-size-complex="12pt" style:font-weight-complex="normal"/>
    </style:style>
    <style:style style:name="T9" style:family="text">
      <style:text-properties style:text-position="0% 100%" fo:font-size="12pt" fo:font-weight="normal" officeooo:rsid="000a1e3b" style:font-size-asian="12pt" style:font-weight-asian="normal" style:font-size-complex="12pt" style:font-weight-complex="normal"/>
    </style:style>
    <style:style style:name="T10" style:family="text">
      <style:text-properties style:text-position="0% 100%" fo:font-size="12pt" fo:font-weight="normal" officeooo:rsid="000aca3b" style:font-size-asian="12pt" style:font-weight-asian="normal" style:font-size-complex="12pt" style:font-weight-complex="normal"/>
    </style:style>
    <style:style style:name="T11" style:family="text">
      <style:text-properties style:text-position="0% 100%" fo:font-size="12pt" fo:font-weight="normal" officeooo:rsid="000c902d"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5 – Capa de Transporte</text:p>
      <text:p text:style-name="P1"/>
      <text:p text:style-name="P2">1) Cumple la fiuncion de multiplexador/Demultiplexador app. To app.</text:p>
      <text:p text:style-name="P2">Soporte de datos.</text:p>
      <text:p text:style-name="P2">Control y deteccion de errores, perdida y duplicacion de datos.</text:p>
      <text:p text:style-name="P2">Control de flujo y de congestion.</text:p>
      <text:p text:style-name="P2"/>
      <text:p text:style-name="P2">2) TCP (Transport Control Protocol):</text:p>
      <text:p text:style-name="P2"><text:tab/>Protocolo confiable, ordenado, buffering, control flujo y congestion.</text:p>
      <text:p text:style-name="P2"><text:tab/>Orientado a streams.</text:p>
      <text:p text:style-name="P2"><text:tab/>PDU (Protocol Data Unit): Segmento.</text:p>
      <text:p text:style-name="P2"><text:tab/>Provee MUX/DEMUX.</text:p>
      <text:p text:style-name="P2"><text:tab/>+ overhead → + confiabilidad</text:p>
      <text:p text:style-name="P2"><text:tab/>Requiere establecer y cerrar conexion.</text:p>
      <text:p text:style-name="P2"><text:tab/>Servicio FDX.</text:p>
      <text:p text:style-name="P2">////////////</text:p>
      <text:p text:style-name="P7">El full-duplex (FDX) es una <text:span text:style-name="T1">tecnología de comunicación que permite la transmisión y recepción simultánea de datos en ambos sentidos de una comunicación</text:span></text:p>
      <text:p text:style-name="P2">////////////</text:p>
      <text:p text:style-name="P2"/>
      <text:p text:style-name="P2"><text:s text:c="3"/>UDP (User Datagram Protocol):</text:p>
      <text:p text:style-name="P2"><text:tab/>- overhead → - confiabilidad.</text:p>
      <text:p text:style-name="P2"><text:tab/>Orientado a Datagramas.</text:p>
      <text:p text:style-name="P2"><text:tab/>PDU: Datagrama (se suele llamar segmento).</text:p>
      <text:p text:style-name="P2"><text:tab/>Solo provee MUX/DEMUX.</text:p>
      <text:p text:style-name="P2"><text:tab/>No requiere establecimiento por conexion.</text:p>
      <text:p text:style-name="P2"><text:tab/>Servicio FDX.</text:p>
      <text:p text:style-name="P2"><text:tab/></text:p>
      <text:p text:style-name="P2">3) a. Confiabilidad:</text:p>
      <text:p text:style-name="P2"/>
      <text:p text:style-name="P2"><text:s text:c="4"/>TCP: Ofrece una <text:span text:style-name="T2">alta confiabilidad,</text:span> ya que garantiza la entrega de datos en el orden correcto y realiza retransmisiones en caso de pérdida de paquetes.</text:p>
      <text:p text:style-name="P2"><text:s text:c="4"/>UDP: Es <text:span text:style-name="T2">menos confiable</text:span>, ya que no garantiza la entrega ni el orden de los datos; no realiza retransmisiones.</text:p>
      <text:p text:style-name="P2"/>
      <text:p text:style-name="P2">b. Multiplexación:</text:p>
      <text:p text:style-name="P2"/>
      <text:p text:style-name="P2"><text:s text:c="4"/>TCP: <text:span text:style-name="T2">Realiza multiplexación</text:span>, lo que significa que puede gestionar múltiples flujos de datos en un solo socket.</text:p>
      <text:p text:style-name="P2"><text:s text:c="4"/>UDP: <text:span text:style-name="T2">No multiplexa de manera intrínseca</text:span>; cada paquete UDP se maneja por separado.</text:p>
      <text:p text:style-name="P2"><text:soft-page-break/></text:p>
      <text:p text:style-name="P2">c. Orientado a la conexión:</text:p>
      <text:p text:style-name="P2"/>
      <text:p text:style-name="P2"><text:s text:c="4"/>TCP: <text:span text:style-name="T2">Es orientado a la conexión,</text:span> lo que significa que establece una conexión antes de la transferencia de datos y la cierra cuando se completa la transferencia.</text:p>
      <text:p text:style-name="P2"><text:s text:c="4"/>UDP: <text:span text:style-name="T2">No es orientado a la conexión;</text:span> los paquetes se envían de manera independiente sin establecer una conexión previa.</text:p>
      <text:p text:style-name="P2"/>
      <text:p text:style-name="P2">d. Controles de congestión:</text:p>
      <text:p text:style-name="P2"/>
      <text:p text:style-name="P2"><text:s text:c="4"/>TCP: I<text:span text:style-name="T2">mplementa controles de congestión</text:span> para regular la velocidad de transmisión y evitar la congestión en la red.</text:p>
      <text:p text:style-name="P2"><text:s text:c="4"/>UDP: <text:span text:style-name="T2">No tiene controles de congestión</text:span>, por lo que puede sobrecargar la red si se utilizan tasas de envío excesivas.</text:p>
      <text:p text:style-name="P2"/>
      <text:p text:style-name="P2">e. Utilización de puertos:</text:p>
      <text:p text:style-name="P2"/>
      <text:p text:style-name="P2"><text:s text:c="4"/>TCP: <text:span text:style-name="T2">Utiliza puertos para identificar aplicaciones y servicios</text:span> en un dispositivo. Cada conexión TCP se asocia con un par de puertos.</text:p>
      <text:p text:style-name="P2"><text:s text:c="4"/>UDP: <text:span text:style-name="T2">También utiliza puertos para la identificación, pero no establece conexiones, por lo que los puertos pueden cambiar con cada paquete.</text:span></text:p>
      <text:p text:style-name="P13"/>
      <text:p text:style-name="P13"/>
      <text:p text:style-name="P3"><text:span text:style-name="T2">5)</text:span><text:span text:style-name="T3"> "segmento" se utiliza en contextos de protocolos orientados a la conexión como TCP, mientras que "datagrama" se emplea en contextos de protocolos no orientados a la conexión como UDP.</text:span></text:p>
      <text:p text:style-name="P14"/>
      <text:p text:style-name="P14"/>
      <text:p text:style-name="P14">6) Proceso fundamental en el protocolo TCP para establecer una conexion entre dos dispositivos:</text:p>
      <text:p text:style-name="P14"><text:s text:c="4"/>Solicitud de conexión (SYN): El dispositivo que inicia la conexión, denominado el "cliente", envía un segmento TCP con el bit SYN (synchronize) establecido a 1 y el bit ACK (acknowledge) en 0 al dispositivo al que desea conectarse, conocido como el "servidor". Esto indica que el cliente quiere establecer una conexión.</text:p>
      <text:p text:style-name="P14"/>
      <text:p text:style-name="P14"><text:s text:c="4"/>Confirmación de conexión (SYN-ACK): El servidor responde enviando un segmento TCP con los bits SYN y ACK establecidos en 1. Esto indica que está dispuesto a establecer una conexión y confirma que ha recibido la solicitud del cliente.</text:p>
      <text:p text:style-name="P14"/>
      <text:p text:style-name="P3"><text:span text:style-name="T3"><text:s text:c="4"/>Confirmación final (ACK): Finalmente, el cliente responde al servidor con un segmento TCP en el que establece el bit ACK en 1. Esto completa el proceso de tres vías </text:span><text:soft-page-break/><text:span text:style-name="T3">y establece una conexión bidireccional entre el cliente y el servidor. A partir de este punto, ambos dispositivos pueden comenzar a intercambiar datos de manera confiable.</text:span></text:p>
      <text:p text:style-name="P14"/>
      <text:p text:style-name="P14"/>
      <text:p text:style-name="P14">7) Este número es un valor de 32 bits que se utiliza para iniciar y sincronizar la comunicación entre dos dispositivos que establecen una conexión TCP.</text:p>
      <text:p text:style-name="P15">Al hacer los saludos se incluye un ISN que sirve para establecer puntos de partida para la secuencia de datos.</text:p>
      <text:p text:style-name="P15"/>
      <text:p text:style-name="P15"/>
      <text:p text:style-name="P15">8) Es un valor que se utiliza en el protocolo TCP para determinar el tamanio maximo de los segmentos (paquetes) que se pueden transmitir en la conexion. Es importante para que los datos se fragmenten de manera eficiente y se transmitan de manera confiable a traves de una red.</text:p>
      <text:p text:style-name="P15">Cuando? Ocurre durante el saludo de tres vias.</text:p>
      <text:p text:style-name="P15">Como? Cuando el cliente inicia la conexion, puede incluir un campo en su segmento TCP llamado MSS. El cliente indica el tamanio maximo de segmento que esta dispuesto a aceptar.</text:p>
      <text:p text:style-name="P15">El servidor en respuesta, puede examinar el MSS y ajustar su propio MSS en funcion de lo que el cliente indico.</text:p>
      <text:p text:style-name="P15">En la confirmacion final, si el servidor realizo algun ajuste en el MSS, el cliente lo vera ajustado.</text:p>
      <text:p text:style-name="P15"/>
      <text:p text:style-name="P15"/>
      <text:p text:style-name="P16">9) <text:tab/>ss -t</text:p>
      <text:p text:style-name="P16"><text:tab/>ss -u</text:p>
      <text:p text:style-name="P16"><text:tab/>ss -tl</text:p>
      <text:p text:style-name="P16"><text:tab/>ss -ul</text:p>
      <text:p text:style-name="P16"><text:tab/></text:p>
      <text:p text:style-name="P17"/>
      <text:p text:style-name="P17">10) Cuando un segmento TCP con el flag SYN activo llega a un host y el puerto de destino no está en estado LISTEN, el host rechaza la conexión, envía un segmento de respuesta RST y no se establece una nueva conexión.</text:p>
      <text:p text:style-name="P4"><text:span text:style-name="T3"><text:tab/>a) </text:span><text:span text:style-name="T4">sudo hping3 -S -p 22 127.0.0.1 -flag SA</text:span></text:p>
      <text:p text:style-name="P17"/>
      <text:p text:style-name="P5"><text:span text:style-name="T3"><text:tab/>b) </text:span><text:span text:style-name="T4">sudo hping3 -S -p 40 127.0.0.1 -flag RA</text:span></text:p>
      <text:p text:style-name="P18"/>
      <text:p text:style-name="P18"/>
      <text:p text:style-name="P6"><text:span text:style-name="T4">1</text:span><text:span text:style-name="T3">1) Cuando llega un datagrama UDP a un host y el puerto de destino no está en estado LISTEN, el host simplemente descarta el datagrama sin procesarlo ni enviar una confirmación.</text:span></text:p>
      <text:p text:style-name="P8"><text:span text:style-name="T6"><text:tab/></text:span><text:span text:style-name="T7">a) </text:span><text:span text:style-name="Source_20_Text"><text:span text:style-name="T5">sudo hping3 -2 -p 5353 127.0.0.1</text:span></text:span><text:span text:style-name="Source_20_Text"><text:span text:style-name="T7"> -udp mode set</text:span></text:span></text:p>
      <text:p text:style-name="P9"><text:soft-page-break/><text:span text:style-name="Source_20_Text"><text:span text:style-name="T8"><text:tab/>b) sudo hping3 -2 -p 5353 127.0.0.1 -ICMP Port Unreachable</text:span></text:span></text:p>
      <text:p text:style-name="P9"><text:span text:style-name="Source_20_Text"><text:span text:style-name="T8"/></text:span></text:p>
      <text:p text:style-name="P9"><text:span text:style-name="Source_20_Text"><text:span text:style-name="T8"/></text:span></text:p>
      <text:p text:style-name="P10"><text:span text:style-name="Source_20_Text"><text:span text:style-name="T8">12) LISTEN represents waiting for a connection request from any remote TCP and port.</text:span></text:span></text:p>
      <text:p text:style-name="P10"><text:span text:style-name="Source_20_Text"><text:span text:style-name="T8">SYN-SENT represents waiting for a matching connection request after having sent a connection request.</text:span></text:span></text:p>
      <text:p text:style-name="P10"><text:span text:style-name="Source_20_Text"><text:span text:style-name="T8">SYN-RECEIVED represents waiting for a confirming connection request acknowledgment after having both</text:span></text:span></text:p>
      <text:p text:style-name="P10"><text:span text:style-name="Source_20_Text"><text:span text:style-name="T8">received and sent a connection request.</text:span></text:span></text:p>
      <text:p text:style-name="P10"><text:span text:style-name="Source_20_Text"><text:span text:style-name="T8">ESTABLISHED represents an open connection, data received can be delivered to the user. The normal state</text:span></text:span></text:p>
      <text:p text:style-name="P10"><text:span text:style-name="Source_20_Text"><text:span text:style-name="T8">for the data transfer phase of the connection.</text:span></text:span></text:p>
      <text:p text:style-name="P10"><text:span text:style-name="Source_20_Text"><text:span text:style-name="T8">FIN-WAIT-1 represents waiting for a connection termination request from the remote TCP, or an</text:span></text:span></text:p>
      <text:p text:style-name="P10"><text:span text:style-name="Source_20_Text"><text:span text:style-name="T8">acknowledgment of the connection termination request previously sent.</text:span></text:span></text:p>
      <text:p text:style-name="P10"><text:span text:style-name="Source_20_Text"><text:span text:style-name="T8">FIN-WAIT-2 represents waiting for a connection termination request from the remote TCP.</text:span></text:span></text:p>
      <text:p text:style-name="P10"><text:span text:style-name="Source_20_Text"><text:span text:style-name="T8">CLOSE-WAIT represents waiting for a connection termination request from the local user.</text:span></text:span></text:p>
      <text:p text:style-name="P10"><text:span text:style-name="Source_20_Text"><text:span text:style-name="T8">CLOSING represents waiting for a connection termination request acknowledgment from the remote</text:span></text:span></text:p>
      <text:p text:style-name="P10"><text:span text:style-name="Source_20_Text"><text:span text:style-name="T8">TCP.</text:span></text:span></text:p>
      <text:p text:style-name="P10"><text:span text:style-name="Source_20_Text"><text:span text:style-name="T8">LAST-ACK represents waiting for an acknowledgment of the connection termination request previously</text:span></text:span></text:p>
      <text:p text:style-name="P10"><text:span text:style-name="Source_20_Text"><text:span text:style-name="T8">sent to the remote TCP (which includes an acknowledgment of its connection termination</text:span></text:span></text:p>
      <text:p text:style-name="P10"><text:span text:style-name="Source_20_Text"><text:span text:style-name="T8">request).</text:span></text:span></text:p>
      <text:p text:style-name="P10"><text:span text:style-name="Source_20_Text"><text:span text:style-name="T8">TIME-WAIT represents waiting for enough time to pass to be sure the remote TCP received the</text:span></text:span></text:p>
      <text:p text:style-name="P10"><text:span text:style-name="Source_20_Text"><text:span text:style-name="T8">acknowledgment of its connection termination request.</text:span></text:span></text:p>
      <text:p text:style-name="P10"><text:span text:style-name="Source_20_Text"><text:span text:style-name="T8">CLOSED represents no connection state at all.</text:span></text:span></text:p>
      <text:p text:style-name="P9"><text:span text:style-name="Source_20_Text"><text:span text:style-name="T8"/></text:span></text:p>
      <text:p text:style-name="P9"><text:span text:style-name="Source_20_Text"><text:span text:style-name="T8"/></text:span></text:p>
      <text:p text:style-name="P12"><text:span text:style-name="Source_20_Text"><text:span text:style-name="T11">13)#################################</text:span></text:span></text:p>
      <text:p text:style-name="P9"><text:span text:style-name="Source_20_Text"><text:span text:style-name="T8"/></text:span></text:p>
      <text:p text:style-name="P9"><text:span text:style-name="Source_20_Text"><text:span text:style-name="T8">1</text:span></text:span><text:span text:style-name="Source_20_Text"><text:span text:style-name="T11">4</text:span></text:span><text:span text:style-name="Source_20_Text"><text:span text:style-name="T8">) <text:s/></text:span></text:span><text:span text:style-name="Source_20_Text"><text:span text:style-name="T9">9 conexiones establecidas.</text:span></text:span></text:p>
      <text:p text:style-name="P11"><text:span text:style-name="Source_20_Text"><text:span text:style-name="T9"><text:tab/>2 (22) (80).</text:span></text:span></text:p>
      <text:p text:style-name="P11"><text:span text:style-name="Source_20_Text"><text:span text:style-name="T9"><text:tab/></text:span></text:span><text:span text:style-name="Source_20_Text"><text:span text:style-name="T10">Residen en la misma maquina.</text:span></text:span></text:p>
      <text:p text:style-name="P11"><text:span text:style-name="Source_20_Text"><text:span text:style-name="T10"><text:tab/>Residen en la misma maquina.</text:span></text:span></text:p>
      <text:p text:style-name="P11"><text:span text:style-name="Source_20_Text"><text:span text:style-name="T10"><text:tab/></text:span></text:span><text:span text:style-name="Source_20_Text"><text:span text:style-name="T11">S</text:span></text:span><text:span text:style-name="Source_20_Text"><text:span text:style-name="T10">shd, </text:span></text:span><text:span text:style-name="Source_20_Text"><text:span text:style-name="T11">apache2, named, x-www.browser</text:span></text:span></text:p>
      <text:p text:style-name="P11"><text:span text:style-name="Source_20_Text"><text:span text:style-name="T11"><text:tab/>1 y 1, close-wait es cerrada por el host remoto, time-wait es <text:tab/>cerrada por el host local.</text:span></text:span></text:p>
      <text:p text:style-name="P11"><text:span text:style-name="Source_20_Text"><text:span text:style-name="T11"><text:tab/>La conexión con estado "SYN-SENT" está pendiente de establecerse</text:span></text:span></text:p>
      <text:p text:style-name="P11"><text:span text:style-name="Source_20_Text"><text:span text:style-name="T11"/></text:span></text:p>
      <text:p text:style-name="P11"><text:span text:style-name="Source_20_Text"><text:span text:style-name="T11"/></text:span></text:p>
      <text:p text:style-name="P12"><text:span text:style-name="Source_20_Text"><text:span text:style-name="T11"/></text:span></text:p>
      <text:p text:style-name="P12"><text:span text:style-name="Source_20_Text"><text:span text:style-name="T11"/></text:span></text:p>
      <text:p text:style-name="P12"><text:span text:style-name="Source_20_Text"><text:span text:style-name="T11"/></text:span></text:p>
      <text:p text:style-name="P12"><text:soft-page-break/><text:span text:style-name="Source_20_Text"><text:span text:style-name="T11">15)</text:span></text:span></text:p>
      <text:p text:style-name="P12"><text:span text:style-name="Source_20_Text"><text:span text:style-name="T11"><text:tab/>a)el segmento que se está perdiendo es la respuesta SYN-ACK del <text:tab/>servidor al cliente.</text:span></text:span></text:p>
      <text:p text:style-name="P12"><text:span text:style-name="Source_20_Text"><text:span text:style-name="T11"/></text:span></text:p>
      <text:p text:style-name="P12"><text:span text:style-name="Source_20_Text"><text:span text:style-name="T11"><text:tab/>b)El cliente está intentando conectarse al protocolo POP3 (Post <text:tab/><text:tab/>Office Protocol 3) en la capa de aplicación y está utilizando el <text:tab/>protocolo TCP (Transmission Control Protocol) en la capa de <text:tab/>transporte. POP3 se utiliza comúnmente para recuperar correos <text:tab/>electrónicos de un servidor de correo.</text:span></text:span></text:p>
      <text:p text:style-name="P12"><text:span text:style-name="Source_20_Text"><text:span text:style-name="T11"/></text:span></text:p>
      <text:p text:style-name="P12"><text:span text:style-name="Source_20_Text"><text:span text:style-name="T11"><text:tab/>c) SYN-ACK (1, 1)</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8:35:14.533411967</meta:creation-date>
    <dc:date>2023-10-16T18:39:13.942487292</dc:date>
    <meta:editing-duration>PT25M32S</meta:editing-duration>
    <meta:editing-cycles>4</meta:editing-cycles>
    <meta:generator>LibreOffice/7.0.4.2$Linux_X86_64 LibreOffice_project/00$Build-2</meta:generator>
    <meta:document-statistic meta:table-count="0" meta:image-count="0" meta:object-count="0" meta:page-count="5" meta:paragraph-count="92" meta:word-count="1114" meta:character-count="7034" meta:non-whitespace-character-count="5914"/>
  </office:meta>
</office:document-meta>
</file>