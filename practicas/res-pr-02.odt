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paragraph-properties fo:text-align="start" style:justify-single-word="false"/>
      <style:text-properties fo:font-weight="bold" officeooo:rsid="0019b563" officeooo:paragraph-rsid="0019b563" style:font-weight-asian="bold" style:font-weight-complex="bold"/>
    </style:style>
    <style:style style:name="P3" style:family="paragraph" style:parent-style-name="Preformatted_20_Text">
      <style:paragraph-properties fo:text-align="start" style:justify-single-word="false"/>
      <style:text-properties fo:font-weight="bold" officeooo:paragraph-rsid="001ddcfd" style:font-weight-asian="bold" style:font-weight-complex="bold"/>
    </style:style>
    <style:style style:name="P4" style:family="paragraph" style:parent-style-name="Preformatted_20_Text">
      <style:paragraph-properties fo:text-align="start" style:justify-single-word="false"/>
      <style:text-properties fo:font-weight="bold" officeooo:rsid="0022d934" officeooo:paragraph-rsid="0022d934" style:font-weight-asian="bold" style:font-weight-complex="bold"/>
    </style:style>
    <style:style style:name="P5" style:family="paragraph" style:parent-style-name="Preformatted_20_Text">
      <style:paragraph-properties fo:text-align="start" style:justify-single-word="false"/>
      <style:text-properties fo:font-weight="bold" officeooo:rsid="0022d934" officeooo:paragraph-rsid="0025cccd" style:font-weight-asian="bold" style:font-weight-complex="bold"/>
    </style:style>
    <style:style style:name="P6" style:family="paragraph" style:parent-style-name="Preformatted_20_Text">
      <style:paragraph-properties fo:text-align="start" style:justify-single-word="false"/>
      <style:text-properties fo:font-weight="bold" officeooo:rsid="00280f6a" officeooo:paragraph-rsid="0029819c" style:font-weight-asian="bold" style:font-weight-complex="bold"/>
    </style:style>
    <style:style style:name="P7" style:family="paragraph" style:parent-style-name="Preformatted_20_Text">
      <style:text-properties fo:font-weight="normal" style:font-weight-asian="normal" style:font-weight-complex="normal"/>
    </style:style>
    <style:style style:name="P8" style:family="paragraph" style:parent-style-name="Preformatted_20_Text">
      <style:paragraph-properties fo:text-align="start" style:justify-single-word="false"/>
      <style:text-properties fo:font-weight="normal" style:font-weight-asian="normal" style:font-weight-complex="normal"/>
    </style:style>
    <style:style style:name="P9" style:family="paragraph" style:parent-style-name="Preformatted_20_Text">
      <style:paragraph-properties fo:text-align="start" style:justify-single-word="false"/>
      <style:text-properties fo:font-weight="normal" officeooo:paragraph-rsid="00184a80" style:font-weight-asian="normal" style:font-weight-complex="normal"/>
    </style:style>
    <style:style style:name="P10" style:family="paragraph" style:parent-style-name="Preformatted_20_Text">
      <style:paragraph-properties fo:text-align="start" style:justify-single-word="false"/>
      <style:text-properties fo:font-weight="normal" officeooo:paragraph-rsid="001ddcfd" style:font-weight-asian="normal" style:font-weight-complex="normal"/>
    </style:style>
    <style:style style:name="P11" style:family="paragraph" style:parent-style-name="Preformatted_20_Text">
      <style:paragraph-properties fo:text-align="start" style:justify-single-word="false"/>
      <style:text-properties fo:font-weight="normal" officeooo:rsid="0019b563" officeooo:paragraph-rsid="0019b563" style:font-weight-asian="normal" style:font-weight-complex="normal"/>
    </style:style>
    <style:style style:name="P12" style:family="paragraph" style:parent-style-name="Preformatted_20_Text">
      <style:paragraph-properties fo:text-align="start" style:justify-single-word="false"/>
      <style:text-properties fo:font-weight="normal" officeooo:rsid="001b932e" officeooo:paragraph-rsid="001b932e" style:font-weight-asian="normal" style:font-weight-complex="normal"/>
    </style:style>
    <style:style style:name="P13" style:family="paragraph" style:parent-style-name="Preformatted_20_Text">
      <style:paragraph-properties fo:text-align="start" style:justify-single-word="false"/>
      <style:text-properties fo:font-weight="normal" officeooo:rsid="0022d934" officeooo:paragraph-rsid="0022d934" style:font-weight-asian="normal" style:font-weight-complex="normal"/>
    </style:style>
    <style:style style:name="P14" style:family="paragraph" style:parent-style-name="Preformatted_20_Text">
      <style:paragraph-properties fo:text-align="start" style:justify-single-word="false"/>
      <style:text-properties fo:font-weight="normal" officeooo:rsid="0022d934" officeooo:paragraph-rsid="0025cccd" style:font-weight-asian="normal" style:font-weight-complex="normal"/>
    </style:style>
    <style:style style:name="P15" style:family="paragraph" style:parent-style-name="Preformatted_20_Text">
      <style:paragraph-properties fo:text-align="start" style:justify-single-word="false"/>
      <style:text-properties fo:font-weight="normal" officeooo:rsid="0026371b" officeooo:paragraph-rsid="0026371b" style:font-weight-asian="normal" style:font-weight-complex="normal"/>
    </style:style>
    <style:style style:name="P16" style:family="paragraph" style:parent-style-name="Preformatted_20_Text">
      <style:paragraph-properties fo:text-align="start" style:justify-single-word="false"/>
      <style:text-properties fo:font-weight="normal" officeooo:rsid="00266c55" officeooo:paragraph-rsid="00266c55" style:font-weight-asian="normal" style:font-weight-complex="normal"/>
    </style:style>
    <style:style style:name="P17" style:family="paragraph" style:parent-style-name="Preformatted_20_Text">
      <style:text-properties style:text-underline-style="solid" style:text-underline-width="auto" style:text-underline-color="font-color" fo:font-weight="bold" style:font-weight-asian="bold" style:font-weight-complex="bold"/>
    </style:style>
    <style:style style:name="P18" style:family="paragraph" style:parent-style-name="Preformatted_20_Text">
      <style:paragraph-properties fo:text-align="start" style:justify-single-word="false"/>
      <style:text-properties officeooo:paragraph-rsid="001ddcfd"/>
    </style:style>
    <style:style style:name="P19" style:family="paragraph" style:parent-style-name="Preformatted_20_Text">
      <style:paragraph-properties fo:text-align="start" style:justify-single-word="false"/>
      <style:text-properties officeooo:paragraph-rsid="00266c55"/>
    </style:style>
    <style:style style:name="P20" style:family="paragraph" style:parent-style-name="Preformatted_20_Text">
      <style:paragraph-properties fo:text-align="start" style:justify-single-word="false"/>
      <style:text-properties style:text-position="0% 100%" fo:font-weight="bold" officeooo:rsid="00280f6a" officeooo:paragraph-rsid="00280f6a" style:font-weight-asian="bold" style:font-weight-complex="bold"/>
    </style:style>
    <style:style style:name="P21" style:family="paragraph" style:parent-style-name="Preformatted_20_Text">
      <style:paragraph-properties fo:text-align="start" style:justify-single-word="false"/>
      <style:text-properties style:text-position="0% 100%" fo:font-weight="normal" officeooo:rsid="0029819c" officeooo:paragraph-rsid="0029819c" style:font-weight-asian="normal" style:font-weight-complex="normal"/>
    </style:style>
    <style:style style:name="P22" style:family="paragraph" style:parent-style-name="Preformatted_20_Text">
      <style:paragraph-properties fo:text-align="start" style:justify-single-word="false"/>
      <style:text-properties officeooo:rsid="00280f6a" officeooo:paragraph-rsid="00280f6a"/>
    </style:style>
    <style:style style:name="P23" style:family="paragraph" style:parent-style-name="Preformatted_20_Text">
      <style:paragraph-properties fo:text-align="start" style:justify-single-word="false"/>
      <style:text-properties style:text-position="0% 100%" fo:font-weight="bold" officeooo:rsid="00266c55" officeooo:paragraph-rsid="00266c55" style:font-weight-asian="bold" style:font-weight-complex="bold"/>
    </style:style>
    <style:style style:name="P24" style:family="paragraph" style:parent-style-name="Preformatted_20_Text">
      <style:paragraph-properties fo:text-align="start" style:justify-single-word="false"/>
      <style:text-properties style:text-position="0% 100%" fo:font-weight="bold" officeooo:rsid="00280f6a" officeooo:paragraph-rsid="00280f6a" style:font-weight-asian="bold" style:font-weight-complex="bold"/>
    </style:style>
    <style:style style:name="P25" style:family="paragraph" style:parent-style-name="Preformatted_20_Text">
      <style:paragraph-properties fo:text-align="start" style:justify-single-word="false"/>
      <style:text-properties style:text-position="0% 100%" fo:font-weight="bold" officeooo:rsid="00280f6a" officeooo:paragraph-rsid="0029819c" style:font-weight-asian="bold" style:font-weight-complex="bold"/>
    </style:style>
    <style:style style:name="P26" style:family="paragraph" style:parent-style-name="Preformatted_20_Text">
      <style:paragraph-properties fo:text-align="start" style:justify-single-word="false"/>
      <style:text-properties style:text-position="0% 100%" fo:font-weight="bold" officeooo:rsid="00280f6a" officeooo:paragraph-rsid="002dffcf" style:font-weight-asian="bold" style:font-weight-complex="bold"/>
    </style:style>
    <style:style style:name="P27" style:family="paragraph" style:parent-style-name="Preformatted_20_Text">
      <style:paragraph-properties fo:text-align="start" style:justify-single-word="false"/>
      <style:text-properties style:text-position="0% 100%" fo:font-weight="bold" officeooo:rsid="002dffcf" officeooo:paragraph-rsid="002dffcf" style:font-weight-asian="bold" style:font-weight-complex="bold"/>
    </style:style>
    <style:style style:name="P28" style:family="paragraph" style:parent-style-name="Preformatted_20_Text">
      <style:paragraph-properties fo:text-align="start" style:justify-single-word="false"/>
      <style:text-properties style:text-position="0% 100%" fo:font-weight="bold" officeooo:rsid="002e2935" officeooo:paragraph-rsid="002e2935" style:font-weight-asian="bold" style:font-weight-complex="bold"/>
    </style:style>
    <style:style style:name="P29" style:family="paragraph" style:parent-style-name="Preformatted_20_Text">
      <style:paragraph-properties fo:text-align="start" style:justify-single-word="false"/>
      <style:text-properties style:text-position="0% 100%" fo:font-weight="bold" officeooo:rsid="002ff727" officeooo:paragraph-rsid="002ff727" style:font-weight-asian="bold" style:font-weight-complex="bold"/>
    </style:style>
    <style:style style:name="P30" style:family="paragraph" style:parent-style-name="Preformatted_20_Text">
      <style:paragraph-properties fo:text-align="start" style:justify-single-word="false"/>
      <style:text-properties style:text-position="0% 100%" fo:font-weight="normal" officeooo:rsid="00266c55" officeooo:paragraph-rsid="00266c55" style:font-weight-asian="normal" style:font-weight-complex="normal"/>
    </style:style>
    <style:style style:name="P31" style:family="paragraph" style:parent-style-name="Preformatted_20_Text">
      <style:paragraph-properties fo:text-align="start" style:justify-single-word="false"/>
      <style:text-properties style:text-position="0% 100%" fo:font-weight="normal" officeooo:rsid="00280f6a" officeooo:paragraph-rsid="00280f6a" style:font-weight-asian="normal" style:font-weight-complex="normal"/>
    </style:style>
    <style:style style:name="P32" style:family="paragraph" style:parent-style-name="Preformatted_20_Text">
      <style:paragraph-properties fo:text-align="start" style:justify-single-word="false"/>
      <style:text-properties style:text-position="0% 100%" fo:font-weight="normal" officeooo:rsid="0029819c" officeooo:paragraph-rsid="0029819c" style:font-weight-asian="normal" style:font-weight-complex="normal"/>
    </style:style>
    <style:style style:name="P33" style:family="paragraph" style:parent-style-name="Preformatted_20_Text">
      <style:paragraph-properties fo:text-align="start" style:justify-single-word="false"/>
      <style:text-properties style:text-position="0% 100%" fo:font-weight="normal" officeooo:rsid="002bb99c" officeooo:paragraph-rsid="002bb99c" style:font-weight-asian="normal" style:font-weight-complex="normal"/>
    </style:style>
    <style:style style:name="P34" style:family="paragraph" style:parent-style-name="Preformatted_20_Text">
      <style:paragraph-properties fo:text-align="start" style:justify-single-word="false"/>
      <style:text-properties style:text-position="0% 100%" fo:font-weight="normal" officeooo:rsid="002cf433" officeooo:paragraph-rsid="002cf433" style:font-weight-asian="normal" style:font-weight-complex="normal"/>
    </style:style>
    <style:style style:name="P35" style:family="paragraph" style:parent-style-name="Preformatted_20_Text">
      <style:paragraph-properties fo:text-align="start" style:justify-single-word="false"/>
      <style:text-properties style:text-position="0% 100%" fo:font-weight="normal" officeooo:rsid="002dffcf" officeooo:paragraph-rsid="002dffcf" style:font-weight-asian="normal" style:font-weight-complex="normal"/>
    </style:style>
    <style:style style:name="P36" style:family="paragraph" style:parent-style-name="Preformatted_20_Text">
      <style:paragraph-properties fo:text-align="start" style:justify-single-word="false"/>
      <style:text-properties style:text-position="0% 100%" fo:font-weight="normal" officeooo:rsid="002e2935" officeooo:paragraph-rsid="002e2935" style:font-weight-asian="normal" style:font-weight-complex="normal"/>
    </style:style>
    <style:style style:name="P37" style:family="paragraph" style:parent-style-name="Preformatted_20_Text">
      <style:paragraph-properties fo:text-align="start" style:justify-single-word="false"/>
      <style:text-properties style:text-position="0% 100%" fo:font-weight="normal" officeooo:rsid="002ff727" officeooo:paragraph-rsid="002ff727" style:font-weight-asian="normal" style:font-weight-complex="normal"/>
    </style:style>
    <style:style style:name="P38" style:family="paragraph" style:parent-style-name="Preformatted_20_Text">
      <style:paragraph-properties fo:text-align="start" style:justify-single-word="false"/>
      <style:text-properties style:text-position="0% 100%" fo:font-weight="normal" officeooo:rsid="002ff727" officeooo:paragraph-rsid="0030b9dc" style:font-weight-asian="normal" style:font-weight-complex="normal"/>
    </style:style>
    <style:style style:name="P39" style:family="paragraph" style:parent-style-name="Preformatted_20_Text">
      <style:paragraph-properties fo:text-align="start" style:justify-single-word="false"/>
      <style:text-properties officeooo:paragraph-rsid="002cf433"/>
    </style:style>
    <style:style style:name="P40" style:family="paragraph" style:parent-style-name="Preformatted_20_Text">
      <style:paragraph-properties fo:text-align="start" style:justify-single-word="false"/>
      <style:text-properties officeooo:paragraph-rsid="002ff727"/>
    </style:style>
    <style:style style:name="P41" style:family="paragraph" style:parent-style-name="Preformatted_20_Text">
      <style:paragraph-properties fo:text-align="start" style:justify-single-word="false"/>
      <style:text-properties officeooo:paragraph-rsid="0030b9dc"/>
    </style:style>
    <style:style style:name="T1" style:family="text">
      <style:text-properties style:text-underline-style="solid" style:text-underline-width="auto" style:text-underline-color="font-color"/>
    </style:style>
    <style:style style:name="T2" style:family="text">
      <style:text-properties officeooo:rsid="001b932e"/>
    </style:style>
    <style:style style:name="T3" style:family="text">
      <style:text-properties fo:font-weight="normal" officeooo:rsid="001ddcfd" style:font-weight-asian="normal" style:font-weight-complex="normal"/>
    </style:style>
    <style:style style:name="T4" style:family="text">
      <style:text-properties officeooo:rsid="0022ef51"/>
    </style:style>
    <style:style style:name="T5" style:family="text">
      <style:text-properties officeooo:rsid="0026371b"/>
    </style:style>
    <style:style style:name="T6" style:family="text">
      <style:text-properties officeooo:rsid="00266c55"/>
    </style:style>
    <style:style style:name="T7" style:family="text">
      <style:text-properties style:text-position="0% 100%"/>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officeooo:rsid="00266c55" style:font-weight-asian="normal" style:font-weight-complex="normal"/>
    </style:style>
    <style:style style:name="T10" style:family="text">
      <style:text-properties style:text-position="0% 100%" fo:font-weight="normal" officeooo:rsid="002cf433" style:font-weight-asian="normal" style:font-weight-complex="normal"/>
    </style:style>
    <style:style style:name="T11" style:family="text">
      <style:text-properties style:text-position="0% 100%" fo:font-weight="normal" officeooo:rsid="002dffcf" style:font-weight-asian="normal" style:font-weight-complex="normal"/>
    </style:style>
    <style:style style:name="T12" style:family="text">
      <style:text-properties style:text-position="0% 100%" fo:font-weight="normal" officeooo:rsid="002ff727" style:font-weight-asian="normal" style:font-weight-complex="normal"/>
    </style:style>
    <style:style style:name="T13" style:family="text">
      <style:text-properties style:text-position="0% 100%" fo:font-weight="bold" officeooo:rsid="002ff727" style:font-weight-asian="bold" style:font-weight-complex="bold"/>
    </style:style>
    <style:style style:name="T14" style:family="text">
      <style:text-properties style:text-position="0% 100%" officeooo:rsid="0029819c"/>
    </style:style>
    <style:style style:name="T15" style:family="text">
      <style:text-properties officeooo:rsid="002bb99c"/>
    </style:style>
    <style:style style:name="T16" style:family="text">
      <style:text-properties officeooo:rsid="002dffcf"/>
    </style:style>
    <style:style style:name="T17" style:family="text">
      <style:text-properties officeooo:rsid="002e2935"/>
    </style:style>
    <style:style style:name="T18" style:family="text">
      <style:text-properties officeooo:rsid="0030b9dc"/>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ACTICA 2:</text:p>
      <text:p text:style-name="Preformatted_20_Text"/>
      <text:p text:style-name="Preformatted_20_Text"/>
      <text:p text:style-name="P1">2. ¿Cuál es la función de la capa de aplicación?</text:p>
      <text:p text:style-name="Preformatted_20_Text">La capa de aplicación, en el contexto de redes de computadoras, es la capa más alta en el modelo OSI (Open Systems Interconnection). Su función principal es proporcionar servicios de red a las aplicaciones y a los usuarios finales. En otras palabras, actúa como un intermediario entre las aplicaciones que se ejecutan en dispositivos y la infraestructura de red subyacente.</text:p>
      <text:p text:style-name="Preformatted_20_Text"/>
      <text:p text:style-name="Preformatted_20_Text"/>
      <text:p text:style-name="P1">3. Si dos procesos deben comunicarse:</text:p>
      <text:p text:style-name="Preformatted_20_Text"><text:tab/>a. ¿Cómo podrían hacerlo si están en diferentes máquinas?</text:p>
      <text:p text:style-name="Preformatted_20_Text"><text:tab/>3.a: Mediante la RED.</text:p>
      <text:p text:style-name="Preformatted_20_Text"><text:tab/>b. Y si están en la misma máquina, ¿qué alternativas existen?</text:p>
      <text:p text:style-name="Preformatted_20_Text"><text:tab/>3.b: Meidante flujo de informacion por pipelines o memoria compartida.</text:p>
      <text:p text:style-name="Preformatted_20_Text"/>
      <text:p text:style-name="Preformatted_20_Text"/>
      <text:p text:style-name="P1">4. Explique brevemente cómo es el modelo Cliente/Servidor. De un ejemplo de un sistema Cliente/Servi-</text:p>
      <text:p text:style-name="P1">dor en la “vida cotidiana” y un ejemplo de un sistema informático que siga el modelo Cliente/Servidor.</text:p>
      <text:p text:style-name="P1">¿Conoce algún otro modelo de comunicación?</text:p>
      <text:p text:style-name="Preformatted_20_Text">En el modelo Cliente/Servidor, dos tipos de programas o entidades se comunican entre sí a través de una red o una interfaz de comunicación.</text:p>
      <text:p text:style-name="Preformatted_20_Text">Ej vida cotidiana: correo electronico.</text:p>
      <text:p text:style-name="Preformatted_20_Text">Ej sistema informatico: aplicacion web.</text:p>
      <text:p text:style-name="Preformatted_20_Text">Otros modelos de comunicacion pueden ser el P2P o una arquitectura de bus.</text:p>
      <text:p text:style-name="Preformatted_20_Text"/>
      <text:p text:style-name="P1">5. Describa la funcionalidad de la entidad genérica “Agente de usuario” o “User agent”.</text:p>
      <text:p text:style-name="Preformatted_20_Text">� Es una interfaz entre el usuario y la aplicación de</text:p>
      <text:p text:style-name="Preformatted_20_Text">red.</text:p>
      <text:p text:style-name="Preformatted_20_Text">� Por ejemplo: en la WEB, el agente de usuario es</text:p>
      <text:p text:style-name="Preformatted_20_Text">el navegador, el cual permite al usuario visualizar</text:p>
      <text:p text:style-name="Preformatted_20_Text">las páginas WEB e interactuar con los elementos</text:p>
      <text:p text:style-name="Preformatted_20_Text">de la misma. El navegador es un proceso que</text:p>
      <text:p text:style-name="Preformatted_20_Text">envía/recibe mensajes por medio de un socket y</text:p>
      <text:p text:style-name="Preformatted_20_Text">además brinda la interfaz al usuario.</text:p>
      <text:p text:style-name="Preformatted_20_Text"/>
      <text:p text:style-name="P1">6. Observe el indice de la RFC2616, busque el apartado donde se describe el requerimiento y la respuesta.</text:p>
      <text:p text:style-name="P1">¿Qué son y en qué se diferencian HTML y HTTP? ¿En que entidad ubicaría a HTML?</text:p>
      <text:p text:style-name="P7"><text:span text:style-name="T1">HTML</text:span> (Hypertext Markup Language): HTML es un lenguaje de marcado utilizado para crear documentos web. Define la estructura y el contenido de una página web, utilizando etiquetas para marcar elementos como encabezados, párrafos, imágenes, enlaces, formularios, etc. HTML se centra en la presentación de la información en una página web y cómo se deben mostrar los elementos en un navegador.</text:p>
      <text:p text:style-name="P7"><text:span text:style-name="T1">HTTP</text:span> (Hypertext Transfer Protocol): HTTP es un protocolo de comunicación utilizado para transferir datos a través de la web. Está diseñado para permitir que los navegadores web soliciten recursos (como páginas HTML) desde servidores web y reciban respuestas. HTTP se centra en la comunicación y el intercambio de datos entre un cliente (generalmente un navegador web) y un servidor web.</text:p>
      <text:p text:style-name="P7"/>
      <text:p text:style-name="P7"/>
      <text:p text:style-name="P7"/>
      <text:p text:style-name="P7"/>
      <text:p text:style-name="P7"/>
      <text:p text:style-name="P7"/>
      <text:p text:style-name="P1"><text:soft-page-break/>7. Utilizando la VM, abra una terminal e investigue sobre el comando curl. Analice para qué sirven los</text:p>
      <text:p text:style-name="P1">siguientes parámetros (-I, -H, -X, -s).</text:p>
      <text:p text:style-name="P8"><text:tab/>curl <text:s/>is <text:s/>a tool to transfer data from or to a server, using one of the</text:p>
      <text:p text:style-name="P8"><text:s text:c="7"/>supported protocols (DICT, FILE, FTP, FTPS, GOPHER, HTTP, HTTPS, <text:s/>IMAP,</text:p>
      <text:p text:style-name="P8"><text:s text:c="7"/>IMAPS, <text:s/>LDAP, <text:s/>LDAPS, <text:s/>MQTT, POP3, POP3S, RTMP, RTMPS, RTSP, SCP, SFTP,</text:p>
      <text:p text:style-name="P8"><text:s text:c="7"/>SMB, SMBS, SMTP, SMTPS, TELNET and TFTP). The command <text:s/>is <text:s/>designed <text:s/>to</text:p>
      <text:p text:style-name="P8"><text:s text:c="7"/>work without user interaction.</text:p>
      <text:p text:style-name="P8"/>
      <text:p text:style-name="P8"><text:s text:c="7"/>curl offers a busload of useful tricks like proxy support, user authen-</text:p>
      <text:p text:style-name="P8"><text:s text:c="7"/>tication, FTP upload, HTTP post, SSL connections, cookies, file <text:s/>trans-</text:p>
      <text:p text:style-name="P9"><text:s text:c="7"/>fer <text:s/>resume, <text:s/>Metalink, <text:s/>and more. As you will see below, the number of</text:p>
      <text:p text:style-name="P9"><text:s text:c="7"/>features will make your head spin!</text:p>
      <text:p text:style-name="P9"/>
      <text:p text:style-name="P9"><text:tab/>-I, --head</text:p>
      <text:p text:style-name="P9"><text:s text:c="14"/>(HTTP FTP FILE) Fetch the headers only! HTTP-servers feature the</text:p>
      <text:p text:style-name="P9"><text:s text:c="14"/>command HEAD which this uses to get nothing but the header of <text:s/>a</text:p>
      <text:p text:style-name="P9"><text:s text:c="14"/>document. <text:s/>When <text:s/>used <text:s/>on an FTP or FILE file, curl displays the</text:p>
      <text:p text:style-name="P9"><text:s text:c="14"/>file size and last modification time only.</text:p>
      <text:p text:style-name="P9"/>
      <text:p text:style-name="P9"><text:tab/>-H, --header &lt;header/@file&gt;</text:p>
      <text:p text:style-name="P9"><text:s text:c="14"/>(HTTP) Extra header to include in the request when sending <text:s/>HTTP</text:p>
      <text:p text:style-name="P9"><text:s text:c="14"/>to <text:s/>a <text:s/>server. You may specify any number of extra headers. Note</text:p>
      <text:p text:style-name="P9"><text:s text:c="14"/>that if you should add a custom header that has the same name as</text:p>
      <text:p text:style-name="P9"><text:s text:c="14"/>one <text:s/>of <text:s/>the <text:s/>internal <text:s/>ones curl would use, your externally set</text:p>
      <text:p text:style-name="P9"><text:s text:c="14"/>header will be used instead of the internal one. This allows you</text:p>
      <text:p text:style-name="P9"><text:s text:c="14"/>to <text:s/>make <text:s/>even <text:s/>trickier <text:s/>stuff than curl would normally do.</text:p>
      <text:p text:style-name="P11"/>
      <text:p text:style-name="P11"><text:tab/>-X, --request &lt;command&gt;</text:p>
      <text:p text:style-name="P11"><text:s text:c="14"/>(HTTP) Specifies a custom request method to use when communicat-</text:p>
      <text:p text:style-name="P11"><text:s text:c="14"/>ing <text:s/>with the HTTP server. <text:s/>The specified request method will be</text:p>
      <text:p text:style-name="P11"><text:s text:c="14"/>used instead of the method otherwise <text:s/>used <text:s/>(which <text:s/>defaults <text:s/>to</text:p>
      <text:p text:style-name="P11"><text:s text:c="14"/>GET). <text:s/>Read <text:s/>the HTTP 1.1 specification for details and explana-</text:p>
      <text:p text:style-name="P11"><text:s text:c="14"/>tions. Common additional HTTP requests include PUT <text:s/>and <text:s/>DELETE,</text:p>
      <text:p text:style-name="P11"><text:s text:c="14"/>but related technologies like WebDAV offers PROPFIND, COPY, MOVE</text:p>
      <text:p text:style-name="P11"><text:s text:c="14"/>and more.</text:p>
      <text:p text:style-name="P11"/>
      <text:p text:style-name="P11"><text:tab/>-s, --silent</text:p>
      <text:p text:style-name="P11"><text:s text:c="14"/>Silent or quiet mode. Don't show progress meter <text:s/>or <text:s/>error <text:s/>mes-</text:p>
      <text:p text:style-name="P11"><text:s text:c="14"/>sages. <text:s text:c="2"/>Makes <text:s/>Curl mute. It will still output the data you ask</text:p>
      <text:p text:style-name="P11"><text:s text:c="14"/>for, potentially even to the terminal/stdout unless you redirect</text:p>
      <text:p text:style-name="P11"><text:s text:c="14"/>it.</text:p>
      <text:p text:style-name="P11"/>
      <text:p text:style-name="P11"/>
      <text:p text:style-name="P2">8. Ejecute el comando curl sin ningún parámetro adicional y acceda a www.redes.unlp.edu.ar. Luego responda:</text:p>
      <text:p text:style-name="P2">a. ¿Cuántos requerimientos realizó y qué recibió? Pruebe redirigiendo la salida(&gt;) del comando curl a un archivo con extensión html y abrirlo con un navegador.</text:p>
      <text:p text:style-name="P12">Contiene la informacion html de una aplicacion web</text:p>
      <text:p text:style-name="P2">b. ¿Cómo funcionan los atributos href de los tags link e img en html?</text:p>
      <text:p text:style-name="P11"><text:span text:style-name="T2">LINK: </text:span>vincular una página HTML con un archivo externo, como una hoja de estilo CSS. Este atributo especifica la URL del recurso externo que se debe cargar y aplicar al documento actual.</text:p>
      <text:p text:style-name="P12">IMG: se utiliza para especificar la fuente (URL) de la imagen que se debe mostrar en la página web, no el atributo href.</text:p>
      <text:p text:style-name="P2">c. Para visualizar la página completa con imágenes como en un navegador, ¿alcanza con realizar un único requerimiento? ¿Cuántos requerimientos serían necesarios para obtener una página que tiene dos CSS, dos Javascript y tres imágenes? Diferencie como funcionaría un navegador respecto al comando curl ejecutado previamente.</text:p>
      <text:p text:style-name="P18"><text:soft-page-break/><text:span text:style-name="T3">Serian necesarios 8 requerimientos, 1html, 2css, 2js, 3img. Si se usa el comando curl sin parámetros se </text:span>obtiene el contenido sin procesar, y no se realiza automáticamente la carga de recursos adicionales como CSS, JavaScript o imágenes.</text:p>
      <text:p text:style-name="P18"/>
      <text:p text:style-name="P18"/>
      <text:p text:style-name="P3">9. Ejecute a continuación los siguientes comandos:</text:p>
      <text:p text:style-name="P10">curl -v -s www.redes.unlp.edu.ar &gt; /dev/null</text:p>
      <text:p text:style-name="P10">curl -I -v -s www.redes.unlp.edu.ar</text:p>
      <text:p text:style-name="P3">Observe la salida y luego repita la prueba, pero previamente inicie una nueva captura en wireshark.</text:p>
      <text:p text:style-name="P3">Utilice la opción Follow Stream. ¿Qué se transmitió en cada caso?</text:p>
      <text:p text:style-name="P3">¿A que se debió esta diferencia entre lo que se transmitió y lo que se mostró en pantalla?</text:p>
      <text:p text:style-name="P13">En uno se muestra la pagina github.com, el otro muestra la pagina con <text:span text:style-name="T4">4 dns.</text:span></text:p>
      <text:p text:style-name="P13"/>
      <text:p text:style-name="P13"/>
      <text:p text:style-name="P4">10. Investigue cómo define las cabeceras la RFC.</text:p>
      <text:p text:style-name="P4">a. ¿Establece todas las cabeceras posibles?.</text:p>
      <text:p text:style-name="P14">a. La RFC (Request for Comments) no establece todas las cabeceras posibles de manera exhaustiva. En cambio, proporciona una lista de cabeceras comunes que los servidores y clientes pueden utilizar para comunicarse. Sin embargo, la especificación permite la extensión mediante cabeceras personalizadas que no están enumeradas en la RFC.</text:p>
      <text:p text:style-name="P4">b. ¿Cuántas cabeceras viajaron en el requerimiento y en la respuesta del ejercicio anterior?</text:p>
      <text:p text:style-name="P15">3 cabeceras y 8 respuestas</text:p>
      <text:p text:style-name="P5">c. ¿La cabecera Date es una de las definidas en la RFC? ¿Qué indica?</text:p>
      <text:p text:style-name="P14">c. Sí, la cabecera "Date" está definida en la RFC HTTP. Esta cabecera se utiliza para indicar la fecha y hora en que se generó la respuesta o se envió la solicitud. Ayuda a los clientes y servidores a mantener un registro del tiempo en que se realizó la comunicación. La fecha y hora se representan en un formato específico según la RFC 2616, como "Tue, 15 Nov 1994 08:12:31 GMT".</text:p>
      <text:p text:style-name="P13"/>
      <text:p text:style-name="P13"/>
      <text:p text:style-name="P4">11. Utilizando curl, realice un requerimiento con el método HEAD al sitio www.redes.unlp.edu.ar e indique:</text:p>
      <text:p text:style-name="P4">a. ¿Qué información brinda la primer línea de la respuesta?</text:p>
      <text:p text:style-name="P13">HTTP/1.1 200 OK, <text:span text:style-name="T5">indica que el servidor respondio con exito (estado 200).</text:span></text:p>
      <text:p text:style-name="P4">b. ¿Cuántos encabezados muestra la respuesta?</text:p>
      <text:p text:style-name="P15">Muestra <text:span text:style-name="T6">7</text:span> encabezados.</text:p>
      <text:p text:style-name="P4">c. ¿Qué servidor web está sirviendo la página?</text:p>
      <text:p text:style-name="P13">Apache/2.4.56 (Unix)</text:p>
      <text:p text:style-name="P4">d. ¿El acceso a la página solicitada fue exitoso o no?</text:p>
      <text:p text:style-name="P16">Fue existoso.</text:p>
      <text:p text:style-name="P4">e. ¿Cuándo fue la última vez que se modificó la página?</text:p>
      <text:p text:style-name="P16">Domingo, 19 de marzo de 2023 19:04:46 GMT</text:p>
      <text:p text:style-name="P23">f. Solicite la página nuevamente con curl usando GET, pero esta vez indique que quiere obtenerla sólo si la misma fue modificada en una fecha posterior a la que efectivamente fue modificada. ¿Cómo lo hace? ¿Qué resultado obtuvo? ¿Puede explicar para qué sirve?</text:p>
      <text:p text:style-name="P19"><text:span text:style-name="T9">“ curl -I --header "If-Modified-Since: Sun, 19 Mar 2023 19:04:46 GMT" www.redes.unlp.edu.ar “</text:span></text:p>
      <text:p text:style-name="P30">HTTP/1.1 304 Not Modified</text:p>
      <text:p text:style-name="P30">Date: Tue, 12 Sep 2023 20:21:52 GMT</text:p>
      <text:p text:style-name="P30">Server: Apache/2.4.56 (Unix)</text:p>
      <text:p text:style-name="P30">Last-Modified: Sun, 19 Mar 2023 19:04:46 GMT</text:p>
      <text:p text:style-name="P30">ETag: "1322-5f7457bd64f80"</text:p>
      <text:p text:style-name="P30">Accept-Ranges: bytes</text:p>
      <text:p text:style-name="P22"><text:span text:style-name="T9">“</text:span><text:span text:style-name="T8">Sirve para reducir la carga del servidor en caso de que no necesitemos entrar.</text:span></text:p>
      <text:p text:style-name="P20"><text:soft-page-break/>12. En HTTP/1.0, ¿cómo sabe el cliente que ya recibió todo el objeto solicitado completamente? ¿Y en HTTP/1.1?</text:p>
      <text:p text:style-name="P31">En resumen, en HTTP/1.0, el cliente a menudo se basa en el cierre de conexión o el encabezado "Content-Length" para determinar cuándo ha recibido completamente un objeto, mientras que en HTTP/1.1, se utilizan métodos más sofisticados como "Content-Length" o "chunked transfer encoding" junto con la persistencia de la conexión para lograr una mayor eficiencia en la transferencia de objetos.</text:p>
      <text:p text:style-name="P31"/>
      <text:p text:style-name="P31"/>
      <text:p text:style-name="P20">13. Investigue los distintos tipos de códigos de retorno de un servidor web y su significado en la RFC.</text:p>
      <text:p text:style-name="P25">¿Qué parte se ve principalmente interesada de esta información, cliente o servidor?</text:p>
      <text:p text:style-name="P21">Cliente.</text:p>
      <text:p text:style-name="P6"><text:span text:style-name="T7">¿Es útil que esté detallado y clasificado en la RFC?. Dentro de la VM, ejecute los siguientes comandos y evalue el estado</text:span><text:span text:style-name="T14"> </text:span><text:span text:style-name="T7">que recibe.</text:span></text:p>
      <text:p text:style-name="P21">Si.</text:p>
      <text:p text:style-name="P20">curl -I http://unlp.edu.ar</text:p>
      <text:p text:style-name="P31">HTTP/1.1 301 Moved Permanently</text:p>
      <text:p text:style-name="P31">Server: nginx/1.18.0</text:p>
      <text:p text:style-name="P31">Date: Tue, 12 Sep 2023 20:48:07 GMT</text:p>
      <text:p text:style-name="P31">Content-Type: text/html</text:p>
      <text:p text:style-name="P31">Content-Length: 169</text:p>
      <text:p text:style-name="P31">Connection: keep-alive</text:p>
      <text:p text:style-name="P31">Location: https://unlp.edu.ar/</text:p>
      <text:p text:style-name="P20">curl -I www.redes.unlp.edu.ar/restringido/index.php</text:p>
      <text:p text:style-name="P31">HTTP/1.1 401 Unauthorized</text:p>
      <text:p text:style-name="P31">Date: Tue, 12 Sep 2023 20:49:00 GMT</text:p>
      <text:p text:style-name="P31">Server: Apache/2.4.56 (Unix)</text:p>
      <text:p text:style-name="P31">WWW-Authenticate: Basic realm="Authentication Required"</text:p>
      <text:p text:style-name="P31">Last-Modified: Sun, 19 Mar 2023 19:04:46 GMT</text:p>
      <text:p text:style-name="P31">ETag: "cb-5f7457bd64f80"</text:p>
      <text:p text:style-name="P31">Accept-Ranges: bytes</text:p>
      <text:p text:style-name="P31">Content-Length: 203</text:p>
      <text:p text:style-name="P31">Content-Type: text/html</text:p>
      <text:p text:style-name="P20">curl -I www.redes.unlp.edu.ar/noexiste</text:p>
      <text:p text:style-name="P31">HTTP/1.1 404 Not Found</text:p>
      <text:p text:style-name="P31">Date: Tue, 12 Sep 2023 20:51:35 GMT</text:p>
      <text:p text:style-name="P31">Server: Apache/2.4.56 (Unix)</text:p>
      <text:p text:style-name="P31">Content-Type: text/html; charset=iso-8859-1</text:p>
      <text:p text:style-name="P31"/>
      <text:p text:style-name="P31"/>
      <text:p text:style-name="P20">14. Utilizando curl, acceda al sitio www.redes.unlp.edu.ar/restringido/index.php y siga las instrucciones y las pistas que vaya recibiendo hasta obtener la respuesta final. Será de utilidad para resolver este ejercicio poder analizar tanto el contenido de cada página como los encabezados.</text:p>
      <text:p text:style-name="P31">¡Felicitaciones, llegaste al final del ejercicio! Fecha: 2023-09-16 20:51:41 Verificación: 56693a981eb55980bacaf9dd61dc61b730fc70dcd3ad49221478f17b7d700e80</text:p>
      <text:p text:style-name="P31"/>
      <text:p text:style-name="P31"/>
      <text:p text:style-name="P20">15. Utilizando la VM, realice las siguientes pruebas:</text:p>
      <text:p text:style-name="P20">a. Ejecute el comando ’curl www.redes.unlp.edu.ar/extras/prueba-http-1-0.txt’ y copie la salida completa (incluyendo los dos saltos de linea del final).</text:p>
      <text:p text:style-name="P20">b. Desde la consola ejecute el comando telnet www.redes.unlp.edu.ar 80 y luego pegue el contenido que tiene almacenado en el portapapeles. ¿Qué ocurre luego de hacerlo?</text:p>
      <text:p text:style-name="P33">Error 400 bad request</text:p>
      <text:p text:style-name="P20">c. Repita el proceso anterior, pero copiando la salida del recurso /extras/prueba-http-1-1.txt. Verifique <text:span text:style-name="T15">q</text:span>ue debería poder pegar varias veces el mismo contenido sin tener que ejecutar telnet nuevamente.</text:p>
      <text:p text:style-name="P31"><text:soft-page-break/>GET /extras/prueba-http-1-0.txt HTTP/1.1</text:p>
      <text:p text:style-name="P31">Host: www.redes.unlp.edu.ar</text:p>
      <text:p text:style-name="P31"/>
      <text:p text:style-name="P31"/>
      <text:p text:style-name="P31">HTTP/1.1 200 OK</text:p>
      <text:p text:style-name="P31">Date: Sat, 16 Sep 2023 21:44:16 GMT</text:p>
      <text:p text:style-name="P31">Server: Apache/2.4.56 (Unix)</text:p>
      <text:p text:style-name="P31">Last-Modified: Sun, 19 Mar 2023 19:04:46 GMT</text:p>
      <text:p text:style-name="P31">ETag: "60-5f7457bd64f80"</text:p>
      <text:p text:style-name="P31">Accept-Ranges: bytes</text:p>
      <text:p text:style-name="P31">Content-Length: 96</text:p>
      <text:p text:style-name="P31">Content-Type: text/plain</text:p>
      <text:p text:style-name="P31"/>
      <text:p text:style-name="P31">GET /http/HTTP-1.1/ HTTP/1.0</text:p>
      <text:p text:style-name="P31">User-Agent: curl/7.38.0</text:p>
      <text:p text:style-name="P31">Host: www.redes.unlp.edu.ar</text:p>
      <text:p text:style-name="P31">Accept: */*</text:p>
      <text:p text:style-name="P31"/>
      <text:p text:style-name="P31"/>
      <text:p text:style-name="P31"/>
      <text:p text:style-name="P31">Connection closed by foreign host.</text:p>
      <text:p text:style-name="P31"/>
      <text:p text:style-name="P31"/>
      <text:p text:style-name="P20">16. En base a lo obtenido en el ejercicio anterior, responda:</text:p>
      <text:p text:style-name="P20">¿Qué está haciendo al ejecutar el comando telnet? ¿Qué lo diferencia con curl?</text:p>
      <text:p text:style-name="P20">Observe la definición de método y recurso en la RFC. Luego responda, ¿Qué método HTTP utilizó?</text:p>
      <text:p text:style-name="P31">En resumen, telnet es una herramienta más genérica para establecer conexiones de terminal remotas y enviar datos sin procesar, mientras que curl está especializado en realizar solicitudes HTTP y mostrar las respuestas de manera más legible.</text:p>
      <text:p text:style-name="P31"/>
      <text:p text:style-name="P31">En tu caso, telnet se usa para simular manualmente una solicitud HTTP al conectarte al servidor y pegar la solicitud, mientras que curl automatiza todo el proceso HTTP y muestra la respuesta de manera más clara y formateada, lo que facilita la interacción con servidores web.</text:p>
      <text:p text:style-name="P31"/>
      <text:p text:style-name="P34">Utilizo el metodo GET.</text:p>
      <text:p text:style-name="P20">¿Qué recurso solicitó?</text:p>
      <text:p text:style-name="P39"><text:span text:style-name="T10">Solicito el </text:span><text:span text:style-name="T11">recurso </text:span>HTTP/1.1</text:p>
      <text:p text:style-name="P26">¿Qué diferencias notó entre los dos casos? ¿Puede explicar por qué?</text:p>
      <text:p text:style-name="P35">En el primero se pasa mas informacion y en el segundo solo la info del recurso necesario.</text:p>
      <text:p text:style-name="P26">¿Cuál de los dos casos le parece más eficiente? Piense en el ejercicio donde analizó la cantidad de requerimientos necesarios para obtener una página con estilos, javascripts e imágenes. El caso <text:span text:style-name="T16">e</text:span>legido, ¿puede traer asociado algún problema?</text:p>
      <text:p text:style-name="P35">Es mas eficiente el segundo caso.</text:p>
      <text:p text:style-name="P35"/>
      <text:p text:style-name="P35"/>
      <text:p text:style-name="P27">17. En el siguiente ejercicio veremos la diferencia entre los métodos POST y GET. Para ello, será necesario utilizar la VM y la herramienta Wireshark.</text:p>
      <text:p text:style-name="P27"><text:span text:style-name="T17">a</text:span>. Abra un navegador e ingrese a la URL: www.redes.unlp.edu.ar e ingrese al link en la sección “Capa de Aplicación” llamado “Métodos HTTP”. En la página mostrada se visualizan dos nuevos links llamados: Método GET y Método POST.</text:p>
      <text:p text:style-name="P26">b. Analice el código HTML.</text:p>
      <text:p text:style-name="P26">c. Utilizando el analizador de paquetes Wireshark capture los paquetes enviados y recibidos al presionar el botón Enviar.</text:p>
      <text:p text:style-name="P26">d. ¿Qué diferencias detectó en los mensajes enviados por el cliente?</text:p>
      <text:p text:style-name="P36">En el post se pueden ver el codigo html</text:p>
      <text:p text:style-name="P26"><text:soft-page-break/>e. ¿Observó alguna diferencia en el browser si se utiliza un mensaje u otro?</text:p>
      <text:p text:style-name="P36">No</text:p>
      <text:p text:style-name="P36"/>
      <text:p text:style-name="P36"/>
      <text:p text:style-name="P28">17.HTTP es un protocolo stateless, para sortear esta carencia muchos servicios se apoyan en el uso de Cookies. ¿En qué RFC se definió dicha funcionalidad? Investigue cuál es el principal uso que se le da a Set-Cookie y Cookie en HTTP. ¿Qué atributo de la RFC original fue en parte aprovechado para la implementación?</text:p>
      <text:p text:style-name="P36">Fue en RFC 2109 donde se introdujo por primera vez el concepto de cookies como una forma de mantener el estado entre las solicitudes. Sin embargo, RFC 2109 tenía algunas deficiencias y problemas de seguridad, y posteriormente se reemplazó por RFC 2965, que a su vez fue obsoleto y reemplazado por el RFC 6265, que es el estándar actual y ampliamente aceptado para el uso de cookies en HTTP.</text:p>
      <text:p text:style-name="P36"/>
      <text:p text:style-name="P36"><text:s text:c="4"/>Set-Cookie: Cuando el servidor quiere establecer una cookie en el cliente, responde a la solicitud HTTP con una cabecera "Set-Cookie". Esta cabecera contiene información sobre la cookie, como su nombre, valor y opciones adicionales, como la fecha de vencimiento y el dominio al que pertenece. El navegador del cliente almacena esta cookie y la enviará de vuelta al servidor con cada solicitud subsiguiente a ese dominio.</text:p>
      <text:p text:style-name="P36"/>
      <text:p text:style-name="P36"><text:s text:c="4"/>Cookie: Cuando el cliente realiza una solicitud HTTP a un servidor, incluye una cabecera "Cookie" que contiene todas las cookies almacenadas para ese dominio. Esto permite que el servidor recupere información sobre el estado de la sesión del cliente, como la autenticación o datos personalizados.</text:p>
      <text:p text:style-name="P36"/>
      <text:p text:style-name="P36"/>
      <text:p text:style-name="P28">19. ¿Cuál es la diferencia entre un protocolo binario y uno basado en texto? ¿de que tipo de protocolo setrata HTTP/1.0, HTTP/1.1 y HTTP/2?</text:p>
      <text:p text:style-name="P37">Binario mas eficiente, texto mas legible para el entendimineto humano.</text:p>
      <text:p text:style-name="P37">HTTP/1.0 y HTTP/1.1 son protocolos basados en texto, mientras que HTTP/2 es un protocolo binario.</text:p>
      <text:p text:style-name="P37"/>
      <text:p text:style-name="P37"/>
      <text:p text:style-name="P29">20. Analice de que se tratan las siguientes características de HTTP/2: stream, frame, server-push</text:p>
      <text:p text:style-name="P37">HTTP/2 introduce streams para permitir la multiplexación eficiente de solicitudes y respuestas en una sola conexión, frames para transmitir información específica de manera eficiente y server push para anticipar y enviar recursos al cliente antes de que los solicite, lo que mejora el rendimiento general de las aplicaciones web. Estas características son fundamentales para la mejora de la velocidad y la eficiencia en comparación con HTTP/1.x.</text:p>
      <text:p text:style-name="P37"/>
      <text:p text:style-name="P37"/>
      <text:p text:style-name="P29">21. Responder las siguientes preguntas:</text:p>
      <text:p text:style-name="P29">a. ¿Qué función cumple la cabecera Host en HTTP 1.1? ¿Existía en HTTP 1.0? ¿Qué sucede en HTT-P/2? (Ayuda: https://undertow.io/blog/2015/04/27/An-in-depth-overview-of-HTTP2.html para HTTP/2)</text:p>
      <text:p text:style-name="P37"><text:span text:style-name="T18">L</text:span>a cabecera "Host" en HTTP 1.1 es esencial para el enrutamiento adecuado de solicitudes HTTP a sitios web específicos en servidores que alojan múltiples sitios web. Esta cabecera no existía en HTTP 1.0 y sigue siendo relevante en HTTP/2 para el mismo propósito <text:span text:style-name="T18">(http/2 usa un paquete comprimido de headers que mejora la eficiencia)</text:span>.</text:p>
      <text:p text:style-name="P29">b. ¿Cómo quedaría en HTTP/2 el siguiente pedido realizado en HTTP/1.1 si se está usando https?</text:p>
      <text:p text:style-name="P29">GET /index.php HTTP/1.1</text:p>
      <text:p text:style-name="P40"><text:span text:style-name="T13">Host: www.info.unlp.edu.ar</text:span></text:p>
      <text:p text:style-name="P38">GET /index.php HTTP/<text:span text:style-name="T18">2</text:span></text:p>
      <text:p text:style-name="P41"><text:span text:style-name="T12">Host: www.info.unlp.edu.a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16T19:43:25.043045365</dc:date>
    <meta:editing-duration>PT5H30M6S</meta:editing-duration>
    <meta:editing-cycles>5</meta:editing-cycles>
    <meta:generator>LibreOffice/7.0.4.2$Linux_X86_64 LibreOffice_project/00$Build-2</meta:generator>
    <meta:document-statistic meta:table-count="0" meta:image-count="0" meta:object-count="0" meta:page-count="6" meta:paragraph-count="195" meta:word-count="2585" meta:character-count="16723" meta:non-whitespace-character-count="13927"/>
  </office:meta>
</office:document-meta>
</file>