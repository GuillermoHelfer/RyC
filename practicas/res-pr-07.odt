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E00000062B8197E8685CB20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officeooo:rsid="000ed3a6" officeooo:paragraph-rsid="000ed3a6" style:font-size-asian="12pt" style:font-size-complex="12pt"/>
    </style:style>
    <style:style style:name="P2" style:family="paragraph" style:parent-style-name="Standard">
      <style:text-properties fo:font-size="12pt" officeooo:rsid="000ee824" officeooo:paragraph-rsid="000ee824" style:font-size-asian="12pt" style:font-size-complex="12pt"/>
    </style:style>
    <style:style style:name="P3" style:family="paragraph" style:parent-style-name="Standard">
      <style:text-properties fo:font-size="12pt" officeooo:paragraph-rsid="000ee824" style:font-size-asian="12pt" style:font-size-complex="12pt"/>
    </style:style>
    <style:style style:name="P4" style:family="paragraph" style:parent-style-name="Standard">
      <style:text-properties fo:font-size="12pt" officeooo:rsid="000f4a02" officeooo:paragraph-rsid="000f4a02" style:font-size-asian="12pt" style:font-size-complex="12pt"/>
    </style:style>
    <style:style style:name="P5" style:family="paragraph" style:parent-style-name="Standard">
      <style:text-properties fo:font-size="12pt" officeooo:rsid="000f4a02" officeooo:paragraph-rsid="000ff801" style:font-size-asian="12pt" style:font-size-complex="12pt"/>
    </style:style>
    <style:style style:name="P6" style:family="paragraph" style:parent-style-name="Standard">
      <style:text-properties fo:font-size="12pt" officeooo:paragraph-rsid="00105033" style:font-size-asian="12pt" style:font-size-complex="12pt"/>
    </style:style>
    <style:style style:name="P7" style:family="paragraph" style:parent-style-name="Standard">
      <style:text-properties fo:font-size="12pt" officeooo:paragraph-rsid="001156f7" style:font-size-asian="12pt" style:font-size-complex="12pt"/>
    </style:style>
    <style:style style:name="P8" style:family="paragraph" style:parent-style-name="Standard">
      <style:text-properties fo:font-size="12pt" officeooo:paragraph-rsid="0012ea8f" style:font-size-asian="12pt" style:font-size-complex="12pt"/>
    </style:style>
    <style:style style:name="P9" style:family="paragraph" style:parent-style-name="Standard">
      <style:text-properties fo:font-size="12pt" officeooo:paragraph-rsid="0013828e" style:font-size-asian="12pt" style:font-size-complex="12pt"/>
    </style:style>
    <style:style style:name="P10" style:family="paragraph" style:parent-style-name="Standard">
      <style:text-properties fo:font-size="12pt" officeooo:paragraph-rsid="0015e359" style:font-size-asian="12pt" style:font-size-complex="12pt"/>
    </style:style>
    <style:style style:name="P11" style:family="paragraph" style:parent-style-name="Standard">
      <style:text-properties officeooo:paragraph-rsid="00105033"/>
    </style:style>
    <style:style style:name="P12" style:family="paragraph" style:parent-style-name="Standard">
      <style:text-properties officeooo:paragraph-rsid="001156f7"/>
    </style:style>
    <style:style style:name="P13" style:family="paragraph" style:parent-style-name="Standard">
      <style:text-properties officeooo:paragraph-rsid="0013828e"/>
    </style:style>
    <style:style style:name="P14" style:family="paragraph" style:parent-style-name="Standard">
      <style:text-properties officeooo:rsid="0013f046" officeooo:paragraph-rsid="0013f046"/>
    </style:style>
    <style:style style:name="P15" style:family="paragraph" style:parent-style-name="Standard">
      <style:paragraph-properties style:writing-mode="lr-tb"/>
      <style:text-properties fo:font-size="12pt" style:font-size-asian="12pt" style:font-size-complex="12pt"/>
    </style:style>
    <style:style style:name="T1" style:family="text">
      <style:text-properties style:font-name="sans-serif"/>
    </style:style>
    <style:style style:name="T2" style:family="text">
      <style:text-properties style:font-name="sans-serif" fo:font-size="13.5pt"/>
    </style:style>
    <style:style style:name="T3" style:family="text">
      <style:text-properties style:font-name="sans-serif" fo:font-size="13.5pt" style:font-size-asian="12pt" style:font-size-complex="12pt"/>
    </style:style>
    <style:style style:name="T4" style:family="text">
      <style:text-properties style:font-name="sans-serif" fo:font-size="13.5pt" officeooo:rsid="000f4a02" style:font-size-asian="12pt" style:font-size-complex="12pt"/>
    </style:style>
    <style:style style:name="T5" style:family="text">
      <style:text-properties style:font-name="sans-serif" fo:font-size="13.5pt" officeooo:rsid="001156f7" style:font-size-asian="12pt" style:font-size-complex="12pt"/>
    </style:style>
    <style:style style:name="T6" style:family="text">
      <style:text-properties style:font-name="sans-serif" fo:font-size="13.5pt" officeooo:rsid="00164e7e"/>
    </style:style>
    <style:style style:name="T7" style:family="text">
      <style:text-properties style:font-name="sans-serif" fo:font-size="12pt" officeooo:rsid="000ff801" style:font-size-asian="12pt" style:font-size-complex="12pt"/>
    </style:style>
    <style:style style:name="T8" style:family="text">
      <style:text-properties style:font-name="sans-serif" fo:font-size="12pt" officeooo:rsid="00105033" style:font-size-asian="12pt" style:font-size-complex="12pt"/>
    </style:style>
    <style:style style:name="T9" style:family="text">
      <style:text-properties style:font-name="sans-serif" fo:font-size="12pt" officeooo:rsid="000f4a02" style:font-size-asian="12pt" style:font-size-complex="12pt"/>
    </style:style>
    <style:style style:name="T10" style:family="text">
      <style:text-properties style:font-name="sans-serif" fo:font-size="12pt" officeooo:rsid="001156f7" style:font-size-asian="12pt" style:font-size-complex="12pt"/>
    </style:style>
    <style:style style:name="T11" style:family="text">
      <style:text-properties style:font-name="sans-serif" officeooo:rsid="000ee824"/>
    </style:style>
    <style:style style:name="T12" style:family="text">
      <style:text-properties style:font-name="sans-serif" officeooo:rsid="000f4a02"/>
    </style:style>
    <style:style style:name="T13" style:family="text">
      <style:text-properties style:font-name="sans-serif" officeooo:rsid="000ff801"/>
    </style:style>
    <style:style style:name="T14" style:family="text">
      <style:text-properties style:font-name="sans-serif" officeooo:rsid="00105033"/>
    </style:style>
    <style:style style:name="T15" style:family="text">
      <style:text-properties style:font-name="sans-serif" officeooo:rsid="001156f7"/>
    </style:style>
    <style:style style:name="T16" style:family="text">
      <style:text-properties style:font-name="sans-serif" officeooo:rsid="00164e7e"/>
    </style:style>
    <style:style style:name="T17" style:family="text">
      <style:text-properties fo:font-size="13.5pt" officeooo:rsid="001156f7" style:font-size-asian="12pt" style:font-size-complex="12pt"/>
    </style:style>
    <style:style style:name="T18" style:family="text">
      <style:text-properties fo:font-size="12pt" style:font-size-asian="12pt" style:font-size-complex="12pt"/>
    </style:style>
    <style:style style:name="T19" style:family="text">
      <style:text-properties fo:font-size="12pt" officeooo:rsid="001156f7" style:font-size-asian="12pt" style:font-size-complex="12pt"/>
    </style:style>
    <style:style style:name="T20" style:family="text">
      <style:text-properties officeooo:rsid="001156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age3R_mcid3"/><text:span text:style-name="T1">1.</text:span><text:bookmark text:name="page3R_mcid4"/> <text:span text:style-name="T1">¿Qué servicios presta la capa de red? ¿Cuál es la PDU en esta capa? ¿Qué</text:span><text:line-break/><text:span text:style-name="T1">dispositivo es considerado sólo de la capa de red?</text:span></text:p>
      <text:p text:style-name="P2"><text:span text:style-name="T1"><text:tab/>Proporciona los servicios de enrutamiento y reenvio de paquetes/datagramas (PDU) entre distintos hosts. El dispositivo principal de esta capa es el router.</text:span></text:p>
      <text:p text:style-name="P2"><text:span text:style-name="T1"/></text:p>
      <text:p text:style-name="P2"><text:bookmark text:name="page3R_mcid8"/><text:span text:style-name="T1">2.</text:span><text:bookmark text:name="page3R_mcid9"/><text:span text:style-name="T1"> ¿Por qué se lo considera un protocolo de mejor esfuerzo?</text:span></text:p>
      <text:p text:style-name="P2"><text:span text:style-name="T1"><text:tab/>Porque hace el mejor esfuerzo en entregar los paquetes a destino pero no garantiza la seguridad o el orden de la informacion.</text:span></text:p>
      <text:p text:style-name="P2"><text:span text:style-name="T1"/></text:p>
      <text:p text:style-name="P2"><text:bookmark text:name="page3R_mcid13"/><text:span text:style-name="T1">3.</text:span><text:bookmark text:name="page3R_mcid14"/><text:span text:style-name="T1"> ¿Cuántas redes clase A, B y C hay? ¿Cuántos hosts como máximo pueden tener cada una?</text:span></text:p>
      <text:p text:style-name="P2"><draw:frame draw:style-name="fr1" draw:name="Image1" text:anchor-type="char" svg:x="0in" svg:y="0.1598in" svg:width="6.9252in" svg:height="1.0126in" draw:z-index="0"><draw:image xlink:href="Pictures/100000000000029E00000062B8197E8685CB203C.png" xlink:type="simple" xlink:show="embed" xlink:actuate="onLoad" draw:mime-type="image/png"/></draw:frame><text:span text:style-name="T1"><text:tab/></text:span></text:p>
      <text:p text:style-name="P3"><text:bookmark text:name="page3R_mcid29"/><text:span text:style-name="T1">4.</text:span><text:bookmark text:name="page3R_mcid30"/><text:span text:style-name="T1"> ¿Qué son las subredes? ¿Por qué es importante siempre especificar la<text:line-break/>máscara de subred asociada?</text:span></text:p>
      <text:p text:style-name="P3"><text:span text:style-name="T1"><text:tab/></text:span><text:span text:style-name="T11">Una subred es un subgrupo de prefijos de direcciones de una red.</text:span></text:p>
      <text:p text:style-name="P3"><text:bookmark text:name="page3R_mcid36"/><text:span text:style-name="T11">La división en subredes plantea que si una red de clase desperdicia muchas<text:line-break/>direcciones IP entonces la misma sea dividida en N subredes más pequeñas que<text:line-break/>aprovechen mejor el espacio de direccionamiento</text:span><text:bookmark text:name="page3R_mcid37"/><text:bookmark text:name="page3R_mcid38"/><text:span text:style-name="T11"><text:line-break/>Las máscaras se utilizan para saber en una dirección IP qué bits son de red y qué<text:line-break/>bits son de host.</text:span></text:p>
      <text:p text:style-name="P3"><text:span text:style-name="T11"/></text:p>
      <text:p text:style-name="P2"><text:bookmark text:name="page3R_mcid41"/><text:span text:style-name="T1">5. Cuál es la finalidad del campo Protocol en la cabecera IP? ¿A qué campos<text:line-break/>de la capa de transporte se asemeja en su funcionalidad?</text:span></text:p>
      <text:p text:style-name="P2"><text:span text:style-name="T1"><text:tab/></text:span><text:span text:style-name="T12">El campo protocol especifica el protocolo de la capa superior al que se le debe entregar el paquete IP. Se asemeja al campo que indica los puertos de destino en la capa de transporte.</text:span></text:p>
      <text:p text:style-name="P2"><text:span text:style-name="T12"/></text:p>
      <text:p text:style-name="P4"><text:bookmark text:name="page21R_mcid5"/><text:span text:style-name="T1">6.</text:span><text:bookmark text:name="page21R_mcid6"/><text:span text:style-name="T1"> Para cada una de las siguientes direcciones IP (172.16.58.223/26,<text:line-break/>163.10.5.49/27, 128.10.1.0/23, 10.1.0.0/24, 8.40.11.179/12) determine:</text:span></text:p>
      <text:p text:style-name="P4"><text:bookmark text:name="page21R_mcid7"/><text:bookmark text:name="page21R_mcid8"/><text:span text:style-name="T1"><text:line-break/> <text:s text:c="3"/>a.</text:span><text:bookmark text:name="page21R_mcid9"/><text:span text:style-name="T1"> ¿De qué clase de red es la dirección dada (Clase A, B o C)?</text:span></text:p>
      <text:p text:style-name="P4"><text:span text:style-name="T1"><text:tab/>172.16.58.223/26 Clase B</text:span></text:p>
      <text:p text:style-name="P4"><text:span text:style-name="T1"><text:tab/>163.10.5.49/27 Clase B</text:span></text:p>
      <text:p text:style-name="P4"><text:span text:style-name="T1"><text:tab/>128.10.1.0/23 Clase B</text:span></text:p>
      <text:p text:style-name="P4"><text:span text:style-name="T1"><text:tab/>10.1.0.0/24 Clase A</text:span></text:p>
      <text:p text:style-name="P4"><text:span text:style-name="T1"><text:tab/>8.40.11.179/12 Clase A</text:span></text:p>
      <text:p text:style-name="P4"><text:span text:style-name="T1"><text:line-break/> <text:s text:c="3"/>b.</text:span><text:bookmark text:name="page21R_mcid12"/><text:span text:style-name="T1"> ¿Cuál es la dirección de subred?</text:span></text:p>
      <text:p text:style-name="P4"><text:span text:style-name="T1"><text:tab/></text:span><text:span text:style-name="T13">Para obtener la direccion de subred de una IP, hay que aplicarle la mascara de subred correspondiente y el resultado es la direccion de subred.</text:span></text:p>
      <text:p text:style-name="P4"><text:span text:style-name="T13"/></text:p>
      <text:p text:style-name="P5"><text:bookmark text:name="page21R_mcid35"/><text:soft-page-break/><text:span text:style-name="T13"><text:s text:c="4"/>c.</text:span><text:bookmark text:name="page21R_mcid36"/><text:span text:style-name="T13"> ¿Cuál es la cantidad máxima de hosts que pueden estar en esa subred?</text:span></text:p>
      <text:p text:style-name="P5"><text:span text:style-name="T13"><text:tab/>Para determinar la cantidad maxima de hosts que pueden estar en esa subred hay que hacer 2^(n) – 2, donde n es 32 – mascara de subred.</text:span></text:p>
      <text:p text:style-name="P5"><text:span text:style-name="T13"><text:s text:c="4"/>d.</text:span><text:bookmark text:name="page21R_mcid39"/><text:span text:style-name="T13"> ¿Cuál es la dirección de broadcast de esa subred?</text:span></text:p>
      <text:p text:style-name="P5"><text:span text:style-name="T13"><text:tab/>La direccion broadcast de esa red seria la siguiente de la ultima del rango, si <text:s/>la cantidad de hosts disponibles es 62, entonces desde la direccion de subred sumamos 62 + 1 y esa es la direccion broadcast.</text:span></text:p>
      <text:p text:style-name="P5"><text:span text:style-name="T13"><text:s text:c="4"/>e.</text:span><text:bookmark text:name="page21R_mcid42"/><text:span text:style-name="T13"> ¿Cuál es el rango de direcciones IP válidas dentro de la subred?</text:span></text:p>
      <text:p text:style-name="P5"><text:span text:style-name="T13"><text:tab/>El rango de direcciones validas va desde el siguiente de la direccion de subred hasta el anterior al broadcast.</text:span></text:p>
      <text:p text:style-name="P5"><text:span text:style-name="T13"/></text:p>
      <text:p text:style-name="P5"><text:bookmark text:name="page23R_mcid1"/><text:span text:style-name="T13">7.</text:span><text:bookmark text:name="page23R_mcid2"/><text:span text:style-name="T13"> Su organización cuenta con la dirección de red 128.50.10.0. Indique:</text:span><text:bookmark text:name="page23R_mcid3"/><text:bookmark text:name="page23R_mcid4"/><text:span text:style-name="T13"><text:line-break/> <text:s text:c="3"/>a.</text:span><text:bookmark text:name="page23R_mcid5"/><text:span text:style-name="T13"> ¿Es una dirección de red o de host?</text:span></text:p>
      <text:p text:style-name="P5"><text:span text:style-name="T13"><text:tab/></text:span><text:span text:style-name="T14">Es una direccion de host puesto que los numeros que corresponden a los hosts no estan en 0.</text:span></text:p>
      <text:p text:style-name="P11"><text:bookmark text:name="page23R_mcid11"/><text:span text:style-name="T8">128.50.10.0 en binario es 10000000 00110010 00001010 00000000</text:span><text:bookmark text:name="page23R_mcid12"/><text:span text:style-name="T8"><text:line-break/>La máscara de red es <text:tab/> <text:s text:c="3"/>11111111 11111111 00000000 00000000</text:span></text:p>
      <text:p text:style-name="P11"><text:bookmark text:name="page23R_mcid16"/><text:span text:style-name="T7"><text:s text:c="4"/>b.</text:span><text:bookmark text:name="page23R_mcid17"/><text:span text:style-name="T7"> Clase a la que pertenece y máscara de clase.</text:span><text:bookmark text:name="page23R_mcid18"/><text:bookmark text:name="page23R_mcid19"/><text:span text:style-name="T7"><text:line-break/><text:tab/>Pertenece a la clase B y la máscara de la clase es 255.255.0.0</text:span><text:bookmark text:name="page23R_mcid20"/><text:bookmark text:name="page23R_mcid21"/><text:span text:style-name="T7"><text:line-break/> <text:s text:c="3"/>c.</text:span><text:bookmark text:name="page23R_mcid22"/><text:span text:style-name="T7"> Cantidad de hosts posibles.</text:span></text:p>
      <text:p text:style-name="P11"><text:span text:style-name="T7"><text:tab/></text:span><text:span text:style-name="T8">2^(16) – 2 = 65534</text:span></text:p>
      <text:p text:style-name="P6"><text:span text:style-name="T12"/></text:p>
      <text:p text:style-name="P6"><text:bookmark text:name="page23R_mcid28"/><text:span text:style-name="T12">d.</text:span><text:bookmark text:name="page23R_mcid29"/><text:span text:style-name="T12"> Se necesitan crear, al menos, 513 subredes. Indique:</text:span><text:bookmark text:name="page23R_mcid30"/><text:bookmark text:name="page23R_mcid31"/><text:span text:style-name="T12"><text:line-break/> <text:tab/>i.</text:span><text:bookmark text:name="page23R_mcid32"/><text:span text:style-name="T12"> Máscara necesaria.</text:span></text:p>
      <text:p text:style-name="P6"><text:span text:style-name="T12"><text:tab/><text:tab/></text:span><text:span text:style-name="T15">Se necesitan al menos 10 bits. Mascara = /22</text:span></text:p>
      <text:p text:style-name="P7"><text:bookmark text:name="page23R_mcid38"/><text:span text:style-name="T12"><text:tab/>i</text:span><text:span text:style-name="T15">i</text:span><text:span text:style-name="T12">.</text:span><text:bookmark text:name="page23R_mcid39"/><text:span text:style-name="T12"> Cantidad de redes asignables.</text:span><text:bookmark text:name="page23R_mcid40"/><text:bookmark text:name="page23R_mcid41"/><text:span text:style-name="T12"><text:line-break/> <text:tab/><text:tab/>1024</text:span><text:bookmark text:name="page23R_mcid42"/><text:bookmark text:name="page23R_mcid43"/><text:span text:style-name="T12"><text:line-break/> <text:tab/>iii.</text:span><text:bookmark text:name="page23R_mcid44"/><text:span text:style-name="T12"> Cantidad de hosts por subred.</text:span><text:bookmark text:name="page23R_mcid45"/><text:bookmark text:name="page23R_mcid46"/><text:span text:style-name="T12"><text:line-break/> <text:tab/><text:tab/></text:span><text:span text:style-name="T15">1022</text:span></text:p>
      <text:p text:style-name="P7"><text:bookmark text:name="page30R_mcid2"/><text:span text:style-name="T15"><text:tab/>iv.</text:span><text:bookmark text:name="page30R_mcid3"/><text:span text:style-name="T15"> Dirección de la subred 710.</text:span></text:p>
      <text:p text:style-name="P7"><text:span text:style-name="T15"><text:tab/><text:tab/></text:span></text:p>
      <text:p text:style-name="P7"><text:span text:style-name="T15"><text:tab/></text:span></text:p>
      <text:p text:style-name="P8"><text:bookmark text:name="page30R_mcid20"/><text:span text:style-name="T15">8.</text:span><text:bookmark text:name="page30R_mcid21"/><text:span text:style-name="T15"> Si usted estuviese a cargo de la administración del bloque IP<text:line-break/>195.200.45.0/24</text:span></text:p>
      <text:p text:style-name="P8"><text:bookmark text:name="page30R_mcid22"/><text:bookmark text:name="page30R_mcid23"/><text:span text:style-name="T15"><text:line-break/><text:tab/>a.</text:span><text:bookmark text:name="page30R_mcid24"/><text:span text:style-name="T15"> ¿Qué máscara utilizaría si necesita definir al menos 9 subredes?</text:span><text:bookmark text:name="page30R_mcid25"/><text:bookmark text:name="page30R_mcid26"/><text:span text:style-name="T15"><text:line-break/>11111111 11111111 11111111 11110000</text:span><text:bookmark text:name="page30R_mcid27"/><text:bookmark text:name="page30R_mcid28"/><text:span text:style-name="T15"><text:line-break/>195.200.45.240</text:span></text:p>
      <text:p text:style-name="P8"><text:bookmark text:name="page30R_mcid29"/><text:bookmark text:name="page30R_mcid30"/><text:span text:style-name="T15"><text:line-break/><text:tab/>b.</text:span><text:bookmark text:name="page30R_mcid31"/><text:span text:style-name="T15"> Indique la dirección de subred de las primeras 9 subredes.</text:span><text:bookmark text:name="page30R_mcid32"/><text:bookmark text:name="page30R_mcid33"/><text:span text:style-name="T15"><text:line-break/>11111111 11111111 11111111 00000000 - 195.200.45.0</text:span><text:bookmark text:name="page30R_mcid34"/><text:bookmark text:name="page30R_mcid35"/><text:span text:style-name="T15"><text:line-break/>11111111 11111111 11111111 00010000 - 195.200.45.16</text:span><text:bookmark text:name="page30R_mcid36"/><text:bookmark text:name="page30R_mcid37"/><text:span text:style-name="T15"><text:line-break/>11111111 11111111 11111111 00100000 - 195.200.45.32</text:span><text:bookmark text:name="page30R_mcid38"/><text:bookmark text:name="page30R_mcid39"/><text:span text:style-name="T15"><text:line-break/>11111111 11111111 11111111 00110000 - 195.200.45.48</text:span><text:bookmark text:name="page30R_mcid40"/><text:bookmark text:name="page30R_mcid41"/><text:span text:style-name="T15"><text:line-break/>11111111 11111111 11111111 01000000 - 195.200.45.64</text:span><text:bookmark text:name="page30R_mcid43"/><text:bookmark text:name="page30R_mcid42"/><text:span text:style-name="T15"><text:line-break/>11111111 11111111 11111111 01010000 - 195.200.45.80</text:span><text:bookmark text:name="page30R_mcid44"/><text:bookmark text:name="page30R_mcid45"/><text:span text:style-name="T15"><text:line-break/>11111111 11111111 11111111 01100000 - 195.200.45.96</text:span><text:bookmark text:name="page30R_mcid46"/><text:bookmark text:name="page30R_mcid47"/><text:span text:style-name="T15"><text:line-break/></text:span><text:soft-page-break/><text:span text:style-name="T15">11111111 11111111 11111111 01110000 - 195.200.45.112</text:span><text:bookmark text:name="page30R_mcid48"/><text:bookmark text:name="page30R_mcid49"/><text:span text:style-name="T15"><text:line-break/>11111111 11111111 11111111 10000000 – 195.200.45.128</text:span></text:p>
      <text:p text:style-name="P8"><text:bookmark text:name="page30R_mcid50"/><text:bookmark text:name="page30R_mcid51"/><text:span text:style-name="T15"><text:line-break/><text:tab/>c.</text:span><text:bookmark text:name="page30R_mcid52"/><text:span text:style-name="T15"> Seleccione una e indique dirección de broadcast y rango de<text:line-break/>direcciones asignables en esa subred.</text:span></text:p>
      <text:p text:style-name="P13"><text:span text:style-name="T10"><text:tab/> 195.200.45.16 → </text:span><text:span text:style-name="Source_20_Text"><text:span text:style-name="T19">11000011.11001000.00101101.00011111 (Dirección de broadcast)</text:span></text:span></text:p>
      <text:p text:style-name="P13"><text:span text:style-name="Source_20_Text"><text:span text:style-name="T19">Por lo tanto, la dirección de broadcast para la subred 195.200.45.16/28 es 195.200.45.31.</text:span></text:span></text:p>
      <text:p text:style-name="P9"><text:span text:style-name="T15"/></text:p>
      <text:p text:style-name="P7"><text:span text:style-name="T15"/></text:p>
      <text:p text:style-name="P7"><text:bookmark text:name="page37R_mcid36"/><text:span text:style-name="T15">12.</text:span><text:bookmark text:name="page37R_mcid37"/><text:span text:style-name="T15"> Listar las redes involucradas en los siguientes bloques CIDR:</text:span><text:bookmark text:name="page37R_mcid38"/><text:bookmark text:name="page37R_mcid39"/><text:span text:style-name="T15"><text:line-break/>▪</text:span><text:bookmark text:name="page37R_mcid40"/><text:span text:style-name="T15"> 200.56.168.0/21</text:span><text:bookmark text:name="page37R_mcid41"/><text:bookmark text:name="page37R_mcid42"/><text:span text:style-name="T15"><text:line-break/>Clase C. Mascara Default /24</text:span><text:bookmark text:name="page37R_mcid43"/><text:bookmark text:name="page37R_mcid44"/><text:span text:style-name="T15"><text:line-break/>11001000 00111000 10101000 00000000 Direccion</text:span><text:bookmark text:name="page37R_mcid45"/><text:span text:style-name="T15"><text:line-break/>11111111 11111111 11111111 00000000 Mascara Default</text:span><text:bookmark text:name="page37R_mcid46"/><text:span text:style-name="T15"><text:line-break/>11111111 11111111 11111000 00000000 CIDR</text:span><text:bookmark text:name="page37R_mcid47"/><text:bookmark text:name="page37R_mcid48"/><text:span text:style-name="T15"><text:line-break/>Las redes involucradas van desde:</text:span><text:bookmark text:name="page37R_mcid49"/><text:bookmark text:name="page37R_mcid50"/><text:span text:style-name="T15"><text:line-break/>11001000 00111000 10101000 00000000 – 200.56.168.0/24</text:span><text:bookmark text:name="page37R_mcid51"/><text:span text:style-name="T15"><text:line-break/>11001000 00111000 10101111 00000000 – 200.56.175.0/24</text:span></text:p>
      <text:p text:style-name="P7"><text:span text:style-name="T15"/></text:p>
      <text:p text:style-name="P10"><text:bookmark text:name="page44R_mcid40"/><text:span text:style-name="T15">14.</text:span><text:bookmark text:name="page44R_mcid41"/><text:span text:style-name="T15"> ¿Qué es y para qué se usa VLSM?</text:span><text:bookmark text:name="page44R_mcid42"/><text:bookmark text:name="page44R_mcid43"/><text:span text:style-name="T15"><text:line-break/>VLSM es realizar divisiones en subredes con máscaras de longitud variable.<text:line-break/>Sugiere hacer varios niveles de división en redes para lograr máscaras óptimas<text:line-break/>para las subredes. Se utiliza para evitar el agotamiento y desperdicio de<text:line-break/>direcciones IP.</text:span></text:p>
      <text:p text:style-name="P10"><text:bookmark text:name="page44R_mcid44"/><text:bookmark text:name="page44R_mcid45"/><text:span text:style-name="T15"><text:line-break/>15.</text:span><text:bookmark text:name="page44R_mcid46"/><text:span text:style-name="T15"> Describa, con sus palabras, el mecanismo para dividir subredes utilizando<text:line-break/>VLSM.</text:span></text:p>
      <text:p text:style-name="P15"><text:bookmark text:name="page46R_mcid0"/><text:span text:style-name="T1">1)</text:span><text:bookmark text:name="page46R_mcid1"/> <text:span text:style-name="T1">Subnetear para la red con mayor cantidad de hosts.</text:span><text:bookmark text:name="page46R_mcid2"/><text:line-break/><text:span text:style-name="T1">2)</text:span><text:bookmark text:name="page46R_mcid3"/> <text:span text:style-name="T1">De las subredes obtenidas, asignar todas las que se puedan con el menor desperdicio posible.</text:span><text:bookmark text:name="page46R_mcid4"/><text:line-break/><text:span text:style-name="T1">3)</text:span><text:bookmark text:name="page46R_mcid5"/> <text:span text:style-name="T1">Si quedan segmentos de</text:span> <text:span text:style-name="T1">red sin una subred asignada volver al p</text:span><text:span text:style-name="T16">unto 1.</text:span></text:p>
      <text:p text:style-name="P12"><text:span text:style-name="T5"/></text:p>
      <text:p text:style-name="P12"><text:span text:style-name="T5"/></text:p>
      <text:p text:style-name="P12"><text:span text:style-name="T5"/></text:p>
      <text:p text:style-name="P12"><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0:47:03.674391666</meta:creation-date>
    <dc:date>2023-12-03T16:39:15.136702698</dc:date>
    <meta:editing-duration>P1DT3H38M26S</meta:editing-duration>
    <meta:editing-cycles>5</meta:editing-cycles>
    <meta:generator>LibreOffice/7.0.4.2$Linux_X86_64 LibreOffice_project/00$Build-2</meta:generator>
    <meta:document-statistic meta:table-count="0" meta:image-count="1" meta:object-count="0" meta:page-count="3" meta:paragraph-count="47" meta:word-count="834" meta:character-count="5216" meta:non-whitespace-character-count="4337"/>
  </office:meta>
</office:document-meta>
</file>